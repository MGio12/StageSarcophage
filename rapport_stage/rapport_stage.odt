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C540000036BDC3B4453.png" manifest:media-type="image/png"/>
  <manifest:file-entry manifest:full-path="Pictures/100000010000015E0000015EF8BB9D41.png" manifest:media-type="image/png"/>
  <manifest:file-entry manifest:full-path="Pictures/100000000000012C000000ABB23F2238.png" manifest:media-type="image/png"/>
  <manifest:file-entry manifest:full-path="Pictures/100000000000060000000400365D767B.png" manifest:media-type="image/png"/>
  <manifest:file-entry manifest:full-path="Pictures/100000000000060000000450CE76039B.png" manifest:media-type="image/png"/>
  <manifest:file-entry manifest:full-path="Pictures/10000000000006000000040047D08FD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text-align="center" style:justify-single-word="false"/>
      <style:text-properties style:font-name="Arial" fo:font-size="11pt" officeooo:paragraph-rsid="001c4c93" style:font-size-asian="11pt" style:font-size-complex="11pt"/>
    </style:style>
    <style:style style:name="P2" style:family="paragraph" style:parent-style-name="Text_20_body">
      <style:paragraph-properties fo:text-align="center" style:justify-single-word="false"/>
      <style:text-properties style:font-name="Times New Roman" fo:font-size="11pt" officeooo:paragraph-rsid="001c4c93" style:font-size-asian="11pt" style:font-size-complex="11pt"/>
    </style:style>
    <style:style style:name="P3" style:family="paragraph" style:parent-style-name="Heading_20_3">
      <style:paragraph-properties fo:text-align="center" style:justify-single-word="false"/>
      <style:text-properties style:font-name="Times New Roman" fo:font-size="18pt" officeooo:paragraph-rsid="002345e0" style:font-size-asian="18pt" style:font-size-complex="18pt"/>
    </style:style>
    <style:style style:name="P4" style:family="paragraph" style:parent-style-name="Text_20_body">
      <style:paragraph-properties fo:text-align="center" style:justify-single-word="false"/>
      <style:text-properties style:font-name="Times New Roman" officeooo:rsid="001d831f" officeooo:paragraph-rsid="001d831f"/>
    </style:style>
    <style:style style:name="P5" style:family="paragraph" style:parent-style-name="Text_20_body">
      <style:paragraph-properties fo:text-align="center" style:justify-single-word="false"/>
      <style:text-properties style:font-name="Times New Roman" officeooo:paragraph-rsid="001d831f"/>
    </style:style>
    <style:style style:name="P6" style:family="paragraph" style:parent-style-name="Text_20_body">
      <style:text-properties style:font-name="Times New Roman" officeooo:paragraph-rsid="001c4c93"/>
    </style:style>
    <style:style style:name="P7" style:family="paragraph" style:parent-style-name="Date">
      <style:paragraph-properties fo:text-align="center" style:justify-single-word="false"/>
      <style:text-properties officeooo:rsid="001c4c93" officeooo:paragraph-rsid="001e5925"/>
    </style:style>
    <style:style style:name="P8" style:family="paragraph" style:parent-style-name="Date">
      <style:paragraph-properties fo:text-align="center" style:justify-single-word="false"/>
      <style:text-properties officeooo:paragraph-rsid="001e5925"/>
    </style:style>
    <style:style style:name="P9" style:family="paragraph" style:parent-style-name="Subtitle">
      <style:text-properties style:font-name="Times New Roman" fo:font-size="14pt" fo:font-weight="bold" officeooo:paragraph-rsid="001c4c93" style:font-size-asian="14pt" style:font-weight-asian="bold" style:font-size-complex="14pt" style:font-weight-complex="bold"/>
    </style:style>
    <style:style style:name="P10" style:family="paragraph" style:parent-style-name="Text_20_body">
      <style:text-properties style:font-name="Times New Roman" fo:font-size="14pt" fo:font-weight="bold" officeooo:paragraph-rsid="001c4c93" style:font-size-asian="14pt" style:font-weight-asian="bold" style:font-size-complex="14pt" style:font-weight-complex="bold"/>
    </style:style>
    <style:style style:name="P11" style:family="paragraph" style:parent-style-name="Date">
      <style:paragraph-properties fo:text-align="start" style:justify-single-word="false"/>
      <style:text-properties fo:font-size="14pt" officeooo:paragraph-rsid="001e5925" style:font-size-asian="14pt" style:font-size-complex="14pt"/>
    </style:style>
    <style:style style:name="P12" style:family="paragraph" style:parent-style-name="Heading_20_1">
      <style:text-properties officeooo:paragraph-rsid="00207682"/>
    </style:style>
    <style:style style:name="P13" style:family="paragraph" style:parent-style-name="Contents_20_3">
      <style:paragraph-properties>
        <style:tab-stops>
          <style:tab-stop style:position="15cm" style:type="right" style:leader-style="dotted" style:leader-text="."/>
        </style:tab-stops>
      </style:paragraph-properties>
    </style:style>
    <style:style style:name="P14" style:family="paragraph" style:parent-style-name="Contents_20_1">
      <style:paragraph-properties>
        <style:tab-stops>
          <style:tab-stop style:position="16cm" style:type="right" style:leader-style="dotted" style:leader-text="."/>
        </style:tab-stops>
      </style:paragraph-properties>
    </style:style>
    <style:style style:name="P15" style:family="paragraph" style:parent-style-name="Contents_20_2">
      <style:paragraph-properties>
        <style:tab-stops>
          <style:tab-stop style:position="15.501cm" style:type="right" style:leader-style="dotted" style:leader-text="."/>
        </style:tab-stops>
      </style:paragraph-properties>
    </style:style>
    <style:style style:name="P16" style:family="paragraph" style:parent-style-name="Text_20_body" style:list-style-name="L1">
      <style:paragraph-properties fo:margin-top="0cm" fo:margin-bottom="0cm" style:contextual-spacing="false"/>
    </style:style>
    <style:style style:name="P17" style:family="paragraph" style:parent-style-name="Text_20_body" style:list-style-name="L2">
      <style:paragraph-properties fo:margin-top="0cm" fo:margin-bottom="0cm" style:contextual-spacing="false"/>
    </style:style>
    <style:style style:name="P18" style:family="paragraph" style:parent-style-name="Text_20_body" style:list-style-name="L3">
      <style:paragraph-properties fo:margin-top="0cm" fo:margin-bottom="0cm" style:contextual-spacing="false"/>
    </style:style>
    <style:style style:name="P19" style:family="paragraph" style:parent-style-name="Text_20_body" style:list-style-name="L4">
      <style:paragraph-properties fo:margin-top="0cm" fo:margin-bottom="0cm" style:contextual-spacing="false"/>
    </style:style>
    <style:style style:name="P20" style:family="paragraph" style:parent-style-name="Text_20_body" style:list-style-name="L5">
      <style:paragraph-properties fo:margin-top="0cm" fo:margin-bottom="0cm" style:contextual-spacing="false"/>
    </style:style>
    <style:style style:name="T1" style:family="text">
      <style:text-properties style:font-name="Times New Roman"/>
    </style:style>
    <style:style style:name="T2" style:family="text">
      <style:text-properties fo:font-weight="normal" officeooo:rsid="001e5925" style:font-weight-asian="normal" style:font-weight-complex="normal"/>
    </style:style>
    <style:style style:name="T3" style:family="text">
      <style:text-properties officeooo:rsid="001c4c93"/>
    </style:style>
    <style:style style:name="T4" style:family="text">
      <style:text-properties officeooo:rsid="001e5925"/>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span text:style-name="T1">IUT DE NICE COTE D’AZUR - DEPARTEMENT INFORMATIQU</text:span><draw:frame draw:style-name="fr1" draw:name="Image2" text:anchor-type="char" svg:x="13.679cm" svg:y="-1.589cm" svg:width="4.394cm" svg:height="4.394cm" draw:z-index="5"><draw:image xlink:href="Pictures/100000010000015E0000015EF8BB9D41.png" xlink:type="simple" xlink:show="embed" xlink:actuate="onLoad" draw:mime-type="image/png"/></draw:frame><text:span text:style-name="T1">E</text:span></text:p>
      <text:p text:style-name="P2"><text:s/>41 BD. NAPOLEON III - 06200 NICE</text:p>
      <text:p text:style-name="P2"/>
      <text:h text:style-name="P3" text:outline-level="3" text:is-list-header="true"><text:bookmark-start text:name="__RefHeading___Toc1270_103736273"/>Développement d’une application web de centralisation et de suivi des PDF de modes dégradés<text:bookmark-end text:name="__RefHeading___Toc1270_103736273"/></text:h>
      <text:p text:style-name="P4">Réalisé par <text:span text:style-name="T2">Maxime Giovanelli</text:span></text:p>
      <text:p text:style-name="P5"/>
      <text:p text:style-name="P6"><draw:frame draw:style-name="fr1" draw:name="Image1" text:anchor-type="char" svg:x="3.81cm" svg:y="-0.023cm" svg:width="9.527cm" svg:height="5.431cm" draw:z-index="4"><draw:image xlink:href="Pictures/100000000000012C000000ABB23F2238.png" xlink:type="simple" xlink:show="embed" xlink:actuate="onLoad" draw:mime-type="image/png"/></draw:frame></text:p>
      <text:p text:style-name="P6"/>
      <text:p text:style-name="P6"/>
      <text:p text:style-name="P6"/>
      <text:p text:style-name="P6"/>
      <text:p text:style-name="P6"/>
      <text:p text:style-name="P6"/>
      <text:p text:style-name="P7">Centre de Lutte contre le Cancer - Antoine Lacassagne.</text:p>
      <text:p text:style-name="P8"><text:s/><text:span text:style-name="T3">33 Av. de Valombrose, 06100 Nice</text:span></text:p>
      <text:p text:style-name="P6"/>
      <text:p text:style-name="P9">Rapport de stage <text:span text:style-name="T3">pour la validation de la deuxième année du </text:span>Bachelor Universitaire de Technologie Informatique</text:p>
      <text:p text:style-name="P9"><text:s/>Année 2025-2026</text:p>
      <text:p text:style-name="P10"/>
      <text:p text:style-name="P11">Tuteur IUT : <text:span text:style-name="T4">M. Olivier Pantz</text:span></text:p>
      <text:p text:style-name="P11">Tuteur Entreprise : M. <text:span text:style-name="T4">Julien Degardin</text:span></text:p>
      <text:h text:style-name="Heading_20_1" text:outline-level="1"><text:soft-page-break/></text:h>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1" text:outline-level="1" text:is-list-header="true"><text:bookmark-start text:name="__RefHeading___Toc1079_2390793328"/><text:bookmark-start text:name="remerciements"/>Remerciements<text:bookmark-end text:name="__RefHeading___Toc1079_2390793328"/><text:bookmark-end text:name="remerciements"/></text:h>
      <text:p text:style-name="First_20_paragraph">Je remercie Julien Degardin, responsable au sein de la DSI du Centre Antoine Lacassagne, pour son encadrement pendant ces huit semaines. Ses retours techniques et sa formulation claire du besoin métier ont aidé à garder un périmètre compatible avec les contraintes réelles d’exploitation hospitalière.</text:p>
      <text:p text:style-name="Text_20_body">Je remercie également Olivier Pantz, tuteur pédagogique à l’IUT Nice Côte d’Azur, pour le suivi du stage et les conseils méthodologiques, ainsi que l’ensemble de l’équipe de la DSI pour son accueil et pour les échanges qui m’ont permis de comprendre le fonctionnement informatique de l’établissement.</text:p>
      <text:p text:style-name="Text_20_body"/>
      <text:p text:style-name="Text_20_body"/>
      <text:h text:style-name="Heading_20_1" text:outline-level="1"><text:bookmark-start text:name="__RefHeading___Toc1081_2390793328"/><text:bookmark-start text:name="résumé"/>Résumé<text:bookmark-end text:name="__RefHeading___Toc1081_2390793328"/><text:bookmark-end text:name="résumé"/></text:h>
      <text:p text:style-name="First_20_paragraph">Ce rapport présente un stage de huit semaines réalisé au Centre Antoine Lacassagne, centre de lutte contre le cancer situé à Nice, au sein de la Direction des Systèmes d’Information (DSI).</text:p>
      <text:p text:style-name="Text_20_body">Le besoin portait sur la continuité d’activité. Quand un outil métier devient indisponible, les équipes soignantes et administratives doivent retrouver rapidement des documents PDF de modes dégradés : formulaires, procédures et fiches réflexes. Avant le projet, ces documents étaient répartis sur plusieurs stockages hétérogènes (SFTP, SMB/CIFS, dossier local). Or, aucun outil ne donnait à la DSI une vue centralisée ni un contrôle simple de leur fraîcheur.</text:p>
      <text:p text:style-name="Text_20_body">La problématique du stage était donc la suivante : comment centraliser et fiabiliser l’accès à ces documents critiques, tout en conciliant des exigences qui tirent en sens opposés - garantir la fraîcheur documentaire sans saturer le réseau hospitalier, imposer une sécurité et une <text:soft-page-break/>traçabilité de niveau HDS sans compliquer l’accès en situation de panne, et rester assez simple pour être exploité durablement par la DSI ?</text:p>
      <text:p text:style-name="Text_20_body">L’application livrée, nommée Arche, utilise Flask, Jinja, SQLAlchemy, SQLite, APScheduler et Docker. Elle collecte les PDF depuis trois types de sources, calcule un état de fraîcheur par document, fournit une interface web avec viewer PDF, gère une purge progressive avec corbeille et expose une API REST. Les opérations sont journalisées ; les contrôles de sécurité couvrent les sessions, les tokens Bearer, le CSRF, la CSP, le chiffrement Fernet des identifiants et le confinement des chemins - autant d’exigences directement issues du contexte HDS.</text:p>
      <text:p text:style-name="Text_20_body">Le livrable est une base applicative documentée, testée et conteneurisable. Il reste à la valider sur l’infrastructure réelle de la DSI.</text:p>
      <text:p text:style-name="Text_20_body"/>
      <text:p text:style-name="Text_20_body"/>
      <text:h text:style-name="P12" text:outline-level="1"><text:bookmark-start text:name="summary"/><text:bookmark-start text:name="__RefHeading___Toc1363_2524517924"/>Summary<text:bookmark-end text:name="summary"/><text:bookmark-end text:name="__RefHeading___Toc1363_2524517924"/></text:h>
      <text:p text:style-name="First_20_paragraph">This report presents an eight-week internship at Centre Antoine Lacassagne, a cancer treatment center in Nice, within its IT department (DSI).</text:p>
      <text:p text:style-name="Text_20_body">The project came from a business continuity need. When standard tools become unavailable, medical and administrative staff need quick access to degraded-mode PDF documents: forms, procedures and reference sheets. Before the project, these documents were spread across heterogeneous servers (SFTP, SMB/CIFS, local storage), with no central tool to track freshness or availability.</text:p>
      <text:p text:style-name="Text_20_body">The main question was: how can access to these critical documents be centralized and secured while reconciling requirements that pull in opposite directions - guaranteeing document freshness without saturating the hospital network, enforcing HDS-level security and traceability without hindering access during outages, and remaining simple enough for the DSI to operate in the long run?</text:p>
      <text:p text:style-name="Text_20_body">The delivered application, Arche, uses Flask, Jinja, SQLAlchemy, SQLite, APScheduler and Docker. It collects PDFs from three source types, computes a freshness status for each <text:soft-page-break/>document, provides a web interface with an integrated PDF viewer, manages progressive purge with a trash bin, exposes a REST API and logs operations. Security controls cover sessions, Bearer tokens, CSRF, CSP, Fernet credential encryption and path confinement.</text:p>
      <text:p text:style-name="Text_20_body">The result is a documented, tested and containerizable application base. The DSI still has to validate it on real infrastructure before production use.</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3"><text:a xlink:type="simple" xlink:href="#__RefHeading___Toc1270_103736273" text:style-name="Index_20_Link" text:visited-style-name="Index_20_Link">Développement d’une application web de centralisation et de suivi des PDF de modes dégradés<text:tab/>1</text:a></text:p>
          <text:p text:style-name="P14"><text:a xlink:type="simple" xlink:href="#__RefHeading___Toc1079_2390793328" text:style-name="Index_20_Link" text:visited-style-name="Index_20_Link">Remerciements<text:tab/>3</text:a></text:p>
          <text:p text:style-name="P14"><text:a xlink:type="simple" xlink:href="#__RefHeading___Toc1081_2390793328" text:style-name="Index_20_Link" text:visited-style-name="Index_20_Link">Résumé<text:tab/>3</text:a></text:p>
          <text:p text:style-name="P14"><text:a xlink:type="simple" xlink:href="#__RefHeading___Toc1363_2524517924" text:style-name="Index_20_Link" text:visited-style-name="Index_20_Link">Summary<text:tab/>4</text:a></text:p>
          <text:p text:style-name="P14"><text:a xlink:type="simple" xlink:href="#__RefHeading___Toc1087_2390793328" text:style-name="Index_20_Link" text:visited-style-name="Index_20_Link">1. Introduction<text:tab/>6</text:a></text:p>
          <text:p text:style-name="P14"><text:a xlink:type="simple" xlink:href="#__RefHeading___Toc1089_2390793328" text:style-name="Index_20_Link" text:visited-style-name="Index_20_Link">2. Analyse de la situation<text:tab/>9</text:a></text:p>
          <text:p text:style-name="P15"><text:a xlink:type="simple" xlink:href="#__RefHeading___Toc1091_2390793328" text:style-name="Index_20_Link" text:visited-style-name="Index_20_Link">2.1 Présentation du Centre Antoine Lacassagne<text:tab/>9</text:a></text:p>
          <text:p text:style-name="P15"><text:a xlink:type="simple" xlink:href="#__RefHeading___Toc1093_2390793328" text:style-name="Index_20_Link" text:visited-style-name="Index_20_Link">2.2 Service DSI et contraintes HDS<text:tab/>9</text:a></text:p>
          <text:p text:style-name="P15"><text:a xlink:type="simple" xlink:href="#__RefHeading___Toc1095_2390793328" text:style-name="Index_20_Link" text:visited-style-name="Index_20_Link">2.3 Analyse des besoins<text:tab/>10</text:a></text:p>
          <text:p text:style-name="P15"><text:a xlink:type="simple" xlink:href="#__RefHeading___Toc1097_2390793328" text:style-name="Index_20_Link" text:visited-style-name="Index_20_Link">2.4 Cahier des charges et planning<text:tab/>11</text:a></text:p>
          <text:p text:style-name="P14"><text:a xlink:type="simple" xlink:href="#__RefHeading___Toc1099_2390793328" text:style-name="Index_20_Link" text:visited-style-name="Index_20_Link">3. Conception et réalisation<text:tab/>11</text:a></text:p>
          <text:p text:style-name="P15"><text:a xlink:type="simple" xlink:href="#__RefHeading___Toc1101_2390793328" text:style-name="Index_20_Link" text:visited-style-name="Index_20_Link">3.1 Choix technologiques et argumentation<text:tab/>11</text:a></text:p>
          <text:p text:style-name="P13"><text:a xlink:type="simple" xlink:href="#__RefHeading___Toc1103_2390793328" text:style-name="Index_20_Link" text:visited-style-name="Index_20_Link">Backend : Flask<text:tab/>12</text:a></text:p>
          <text:p text:style-name="P13"><text:a xlink:type="simple" xlink:href="#__RefHeading___Toc1105_2390793328" text:style-name="Index_20_Link" text:visited-style-name="Index_20_Link">Base de données : SQLite via SQLAlchemy<text:tab/>12</text:a></text:p>
          <text:p text:style-name="P13"><text:a xlink:type="simple" xlink:href="#__RefHeading___Toc1107_2390793328" text:style-name="Index_20_Link" text:visited-style-name="Index_20_Link">File de jobs : ThreadPoolExecutor<text:tab/>12</text:a></text:p>
          <text:p text:style-name="P13"><text:a xlink:type="simple" xlink:href="#__RefHeading___Toc1109_2390793328" text:style-name="Index_20_Link" text:visited-style-name="Index_20_Link">Chiffrement des identifiants : Fernet<text:tab/>12</text:a></text:p>
          <text:p text:style-name="P15"><text:a xlink:type="simple" xlink:href="#__RefHeading___Toc1111_2390793328" text:style-name="Index_20_Link" text:visited-style-name="Index_20_Link">3.2 Architecture applicative<text:tab/>13</text:a></text:p>
          <text:p text:style-name="P13"><text:a xlink:type="simple" xlink:href="#__RefHeading___Toc1113_2390793328" text:style-name="Index_20_Link" text:visited-style-name="Index_20_Link">Les jobs planifiés : trois leçons sur la concurrence<text:tab/>14</text:a></text:p>
          <text:p text:style-name="P15"><text:a xlink:type="simple" xlink:href="#__RefHeading___Toc1115_2390793328" text:style-name="Index_20_Link" text:visited-style-name="Index_20_Link">3.3 Sources et synchronisation<text:tab/>15</text:a></text:p>
          <text:p text:style-name="P15"><text:a xlink:type="simple" xlink:href="#__RefHeading___Toc1117_2390793328" text:style-name="Index_20_Link" text:visited-style-name="Index_20_Link">3.4 Fraîcheur, purge et corbeille<text:tab/>18</text:a></text:p>
          <text:p text:style-name="P15"><text:a xlink:type="simple" xlink:href="#__RefHeading___Toc1119_2390793328" text:style-name="Index_20_Link" text:visited-style-name="Index_20_Link">3.5 Interface web et parcours utilisateur<text:tab/>19</text:a></text:p>
          <text:p text:style-name="P15"><text:a xlink:type="simple" xlink:href="#__RefHeading___Toc1121_2390793328" text:style-name="Index_20_Link" text:visited-style-name="Index_20_Link">3.6 API REST<text:tab/>20</text:a></text:p>
          <text:p text:style-name="P15"><text:a xlink:type="simple" xlink:href="#__RefHeading___Toc1123_2390793328" text:style-name="Index_20_Link" text:visited-style-name="Index_20_Link"><text:soft-page-break/>3.7 Sécurité<text:tab/>20</text:a></text:p>
          <text:p text:style-name="P15"><text:a xlink:type="simple" xlink:href="#__RefHeading___Toc1125_2390793328" text:style-name="Index_20_Link" text:visited-style-name="Index_20_Link">3.8 Tests et qualité<text:tab/>21</text:a></text:p>
          <text:p text:style-name="P15"><text:a xlink:type="simple" xlink:href="#__RefHeading___Toc1127_2390793328" text:style-name="Index_20_Link" text:visited-style-name="Index_20_Link">3.9 Déploiement et exploitation<text:tab/>22</text:a></text:p>
          <text:p text:style-name="P14"><text:a xlink:type="simple" xlink:href="#__RefHeading___Toc1129_2390793328" text:style-name="Index_20_Link" text:visited-style-name="Index_20_Link">4. Bilan et perspectives<text:tab/>23</text:a></text:p>
          <text:p text:style-name="P15"><text:a xlink:type="simple" xlink:href="#__RefHeading___Toc1131_2390793328" text:style-name="Index_20_Link" text:visited-style-name="Index_20_Link">4.1 Résultats obtenus<text:tab/>23</text:a></text:p>
          <text:p text:style-name="P15"><text:a xlink:type="simple" xlink:href="#__RefHeading___Toc1133_2390793328" text:style-name="Index_20_Link" text:visited-style-name="Index_20_Link">4.2 Perspectives et évolutions<text:tab/>23</text:a></text:p>
          <text:p text:style-name="P15"><text:a xlink:type="simple" xlink:href="#__RefHeading___Toc1135_2390793328" text:style-name="Index_20_Link" text:visited-style-name="Index_20_Link">4.3 Accompagnement du CSU lors des interventions<text:tab/>23</text:a></text:p>
          <text:p text:style-name="P13"><text:a xlink:type="simple" xlink:href="#__RefHeading___Toc1137_2390793328" text:style-name="Index_20_Link" text:visited-style-name="Index_20_Link">Continuité de service en milieu hospitalier<text:tab/>24</text:a></text:p>
          <text:p text:style-name="P13"><text:a xlink:type="simple" xlink:href="#__RefHeading___Toc1139_2390793328" text:style-name="Index_20_Link" text:visited-style-name="Index_20_Link">Relation avec les utilisateurs hospitaliers<text:tab/>24</text:a></text:p>
          <text:p text:style-name="P14"><text:a xlink:type="simple" xlink:href="#__RefHeading___Toc1141_2390793328" text:style-name="Index_20_Link" text:visited-style-name="Index_20_Link">5. Difficultés rencontrées<text:tab/>25</text:a></text:p>
          <text:p text:style-name="P14"><text:a xlink:type="simple" xlink:href="#__RefHeading___Toc1143_2390793328" text:style-name="Index_20_Link" text:visited-style-name="Index_20_Link">6. Conclusion<text:tab/>26</text:a></text:p>
          <text:p text:style-name="P14"><text:a xlink:type="simple" xlink:href="#__RefHeading___Toc1157_2390793328" text:style-name="Index_20_Link" text:visited-style-name="Index_20_Link">Table des illustrations<text:tab/>27</text:a></text:p>
          <text:p text:style-name="P14"><text:a xlink:type="simple" xlink:href="#__RefHeading___Toc1085_2390793328" text:style-name="Index_20_Link" text:visited-style-name="Index_20_Link">Glossaire<text:tab/>27</text:a></text:p>
          <text:p text:style-name="P14"><text:a xlink:type="simple" xlink:href="#__RefHeading___Toc1145_2390793328" text:style-name="Index_20_Link" text:visited-style-name="Index_20_Link">Bibliographie et sitographie<text:tab/>29</text:a></text:p>
          <text:p text:style-name="P15"><text:a xlink:type="simple" xlink:href="#__RefHeading___Toc1147_2390793328" text:style-name="Index_20_Link" text:visited-style-name="Index_20_Link">Documentation technique<text:tab/>29</text:a></text:p>
          <text:p text:style-name="P15"><text:a xlink:type="simple" xlink:href="#__RefHeading___Toc1149_2390793328" text:style-name="Index_20_Link" text:visited-style-name="Index_20_Link">Sources institutionnelles<text:tab/>30</text:a></text:p>
        </text:index-body>
      </text:table-of-content>
      <text:h text:style-name="Heading_20_1" text:outline-level="1" text:is-list-header="true"/>
      <text:h text:style-name="Heading_20_1" text:outline-level="1"><text:bookmark-start text:name="__RefHeading___Toc1087_2390793328"/><text:bookmark-start text:name="introduction"/>1. Introduction<text:bookmark-end text:name="__RefHeading___Toc1087_2390793328"/><text:bookmark-end text:name="introduction"/></text:h>
      <text:p text:style-name="First_20_paragraph">Le Centre Antoine Lacassagne utilise plusieurs outils informatiques pour les soins, le suivi des patients et les procédures administratives. Lorsqu’un de ces outils devient indisponible (panne réseau, mise à jour bloquante, incident serveur), le personnel doit continuer à travailler. Les <text:span text:style-name="T5">modes dégradés</text:span> répondent à ce besoin avec des procédures et formulaires papier ou PDF qui remplacent temporairement les outils numériques habituels.</text:p>
      <text:p text:style-name="Text_20_body"/>
      <text:p text:style-name="Text_20_body">Ces documents existent dans l’établissement, mais leur gestion reste dispersée : un serveur SFTP Linux pour le bloc opératoire, un partage SMB Windows pour le service des urgences, un dossier local pour d’autres services. Cette fragmentation créait un vide opérationnel : il n’existait pas de vue centralisée pour répondre à des questions simples comme « ce document <text:soft-page-break/>est-il encore à jour ? », « existe-t-il toujours sur le serveur source ? » ou « quand a-t-il été modifié pour la dernière fois ? ».</text:p>
      <text:p text:style-name="Text_20_body">La mission confiée par la DSI était de concevoir et développer une application web interne pour combler ce vide. Concrètement, cela impliquait de résoudre quatre contraintes simultanées : fédérer des protocoles hétérogènes dans un point d’accès unique ; calculer un état de fraîcheur documentaire sans saturer le réseau ; protéger les identifiants de connexion aux serveurs tout en gardant une administration simple ; et déployer l’application sur une infrastructure hospitalière sans ajouter de composants lourds.</text:p>
      <text:p text:style-name="Text_20_body">La problématique du stage peut donc se formuler ainsi : comment centraliser et fiabiliser l’accès à ces documents critiques, tout en conciliant des exigences qui tirent en sens opposés - garantir la fraîcheur documentaire sans saturer le réseau hospitalier, imposer une sécurité et une traçabilité de niveau HDS sans compliquer l’accès en situation de panne, et rester assez simple pour être exploité durablement par la DSI ? L’ensemble de ce rapport est construit autour de cette question, et la conclusion y répond au regard des résultats obtenus.</text:p>
      <text:p text:style-name="Text_20_body">J’ai conçu et développé Arche en réponse à cette problématique. L’application collecte les PDF depuis les sources déclarées, conserve une copie locale avec déduplication, calcule un état de fraîcheur par document, fournit une interface web de consultation et journalise les opérations. La figure 1 montre le passage d’un accès dispersé sur plusieurs serveurs à un accès centralisé, sécurisé et traçable.</text:p>
      <text:p text:style-name="FigureWithCaption"><text:soft-page-break/><draw:frame draw:style-name="fr2" draw:name="img1" text:anchor-type="as-char" svg:width="16.002cm" style:rel-width="100%" svg:height="11.501cm" style:rel-height="scale" draw:z-index="0"><draw:image xlink:href="Pictures/100000000000060000000450CE76039B.png" xlink:type="simple" xlink:show="embed" xlink:actuate="onLoad" draw:mime-type="image/png"/></draw:frame></text:p>
      <text:p text:style-name="FigureCaption">Figure 1 : Situation avant et après Arche : dispersion des sources et accès centralisé.</text:p>
      <text:p text:style-name="Text_20_body">Le rapport suit trois parties, construites sur un plan problème/solution. La première analyse la situation : l’établissement, la DSI, les contraintes HDS et les besoins qui ont délimité le périmètre. La deuxième retrace la conception et la réalisation dans l’ordre où les problèmes se sont réellement posés : pour chaque sous-système, j’expose la difficulté rencontrée, les solutions envisagées et celle que j’ai retenue - y compris mes premières versions imparfaites, car ce sont souvent elles qui m’ont le plus appris. La troisième dresse le bilan - ce qui est livré, ce qui reste à valider, les priorités pour une reprise par la DSI - et revient sur la seconde mission du stage, l’accompagnement du support aux utilisateurs. Une dernière section rassemble les difficultés transversales qui ont structuré le déroulement du stage, avant que la conclusion ne réponde à la problématique posée.</text:p>
      <text:h text:style-name="Heading_20_1" text:outline-level="1"><text:soft-page-break/></text:h>
      <text:h text:style-name="Heading_20_1" text:outline-level="1"/>
      <text:h text:style-name="Heading_20_1" text:outline-level="1"><text:bookmark-start text:name="__RefHeading___Toc1089_2390793328"/><text:bookmark-start text:name="partie-i-analyse-de-la-situation"/>2. Analyse de la situation<text:bookmark-end text:name="__RefHeading___Toc1089_2390793328"/><text:bookmark-end text:name="partie-i-analyse-de-la-situation"/></text:h>
      <text:h text:style-name="Heading_20_2" text:outline-level="2"><text:bookmark-start text:name="__RefHeading___Toc1091_2390793328"/><text:bookmark-start text:name="i.1-présentation-du-centre-antoine-lacassagne"/>2.1 Présentation du Centre Antoine Lacassagne<text:bookmark-end text:name="__RefHeading___Toc1091_2390793328"/><text:bookmark-end text:name="i.1-présentation-du-centre-antoine-lacassagne"/></text:h>
      <text:p text:style-name="First_20_paragraph">Le Centre Antoine Lacassagne (CAL) est un Centre de Lutte Contre le Cancer (CLCC) situé au 33 avenue de Valombrose à Nice. Fondé en 1947, il fait partie des vingt établissements du réseau Unicancer entièrement dédiés à la prise en charge du cancer ; il accueille chaque année plus de 15 000 patients et emploie environ 800 personnes. Il couvre les trois missions des CLCC : soins (oncologie médicale, radiothérapie, chirurgie), recherche clinique et formation.</text:p>
      <text:p text:style-name="Text_20_body">Ce qui rend le CAL particulier pour un projet informatique, c’est la nature des données qu’il traite. Son système d’information porte des données de santé au sens de la réglementation française - dossiers patients, prescriptions, imagerie médicale - ce qui impose des exigences fortes de sécurité, de traçabilité et de confidentialité. La DSI gère l’infrastructure réseau, les serveurs, les applications métier et la sécurité des systèmes dans ce cadre contraint.</text:p>
      <text:h text:style-name="Heading_20_2" text:outline-level="2"><text:bookmark-start text:name="__RefHeading___Toc1093_2390793328"/><text:bookmark-start text:name="i.2-service-dsi-et-contraintes-hds"/>2.2 Service DSI et contraintes HDS<text:bookmark-end text:name="__RefHeading___Toc1093_2390793328"/><text:bookmark-end text:name="i.2-service-dsi-et-contraintes-hds"/></text:h>
      <text:p text:style-name="First_20_paragraph">La DSI du CAL intervient sur un périmètre large : gestion des accès, exploitation des serveurs, déploiement d’applications internes, sauvegardes et continuité de service. Le contexte hospitalier impose plusieurs contraintes spécifiques.</text:p>
      <text:p text:style-name="Text_20_body"><text:span text:style-name="T5">Exigences HDS</text:span> : la certification HDS (Hébergeur de Données de Santé) encadre en France l’hébergement de données médicales. Elle repose sur trois piliers : documenter les mesures de sécurité, tracer tous les accès, et formaliser les procédures de sauvegarde et de gestion des incidents. Cette certification vise l’hébergement des données ; une application interne manipulant des documents de l’établissement doit néanmoins s’aligner sur les mêmes exigences. Pour Arche, elles se sont traduites concrètement par le chiffrement des identifiants, les journaux d’opérations, le contrôle des accès par rôle et la gestion séparée des secrets.</text:p>
      <text:p text:style-name="Text_20_body"><text:soft-page-break/><text:span text:style-name="T5">Continuité d’activité</text:span> : un établissement de santé doit continuer à fonctionner lors d’une panne informatique. Des procédures de mode dégradé existent pour les situations critiques : panne du dossier patient, indisponibilité du système de prescription, coupure réseau. Ces procédures reposent sur des documents PDF qui doivent rester accessibles même lorsque l’outil principal ne l’est plus.</text:p>
      <text:p text:style-name="Text_20_body"><text:span text:style-name="T5">Contraintes de déploiement</text:span> : la DSI ne souhaitait pas maintenir une infrastructure complexe pour une application interne de portée limitée. Le cahier des charges précisait donc : SQLite acceptable, pas de serveur de base de données externe requis, déploiement par conteneur Docker, configuration par variables d’environnement.</text:p>
      <text:h text:style-name="Heading_20_2" text:outline-level="2"><text:bookmark-start text:name="__RefHeading___Toc1095_2390793328"/><text:bookmark-start text:name="i.3-analyse-des-besoins"/>2.3 Analyse des besoins<text:bookmark-end text:name="__RefHeading___Toc1095_2390793328"/><text:bookmark-end text:name="i.3-analyse-des-besoins"/></text:h>
      <text:p text:style-name="First_20_paragraph">L’analyse des besoins a structuré la demande en trois niveaux, du plus critique au plus opérationnel.</text:p>
      <text:p text:style-name="Text_20_body"><text:span text:style-name="T5">Besoins fonctionnels primaires</text:span> - le cœur du système, sans lequel rien d’autre n’a de sens :</text:p>
      <text:list text:style-name="L1">
        <text:list-item>
          <text:p text:style-name="P16">Déclarer des sources (SFTP, SMB, local), tester leur connexion, configurer leur fréquence de synchronisation.</text:p>
        </text:list-item>
        <text:list-item>
          <text:p text:style-name="P16">Synchroniser automatiquement les PDF depuis ces sources, en conservant une copie locale.</text:p>
        </text:list-item>
        <text:list-item>
          <text:p text:style-name="P16">Suivre la fraîcheur de chaque document (date de dernière modification source, statut ok/avertissement/critique).</text:p>
        </text:list-item>
        <text:list-item>
          <text:p text:style-name="P16">Permettre la consultation, la recherche, le filtrage et le téléchargement des documents depuis une interface web.</text:p>
        </text:list-item>
        <text:list-item>
          <text:p text:style-name="P16">Conserver un journal de toutes les opérations (synchronisations, purges, connexions, erreurs).</text:p>
        </text:list-item>
      </text:list>
      <text:p text:style-name="First_20_paragraph"><text:span text:style-name="T5">Besoins fonctionnels secondaires</text:span> - la qualité d’exploitation, qui conditionne l’adoption par la DSI :</text:p>
      <text:list text:style-name="L2">
        <text:list-item>
          <text:p text:style-name="P17">Gestion des utilisateurs, des rôles et des permissions (RBAC).</text:p>
        </text:list-item>
        <text:list-item>
          <text:p text:style-name="P17">API REST pour permettre des intégrations futures (monitoring, outils DSI).</text:p>
        </text:list-item>
        <text:list-item>
          <text:p text:style-name="P17">Purge automatique des documents dépassant leur durée de rétention, avec passage par une corbeille.</text:p>
        </text:list-item>
        <text:list-item>
          <text:p text:style-name="P17"><text:soft-page-break/>Notifications par email en cas d’erreur ou de documents critiques.</text:p>
        </text:list-item>
      </text:list>
      <text:p text:style-name="First_20_paragraph"><text:span text:style-name="T5">Contraintes non fonctionnelles</text:span> - les conditions sine qua non d’un déploiement hospitalier :</text:p>
      <text:list text:style-name="L3">
        <text:list-item>
          <text:p text:style-name="P18">Sécurité : chiffrement des identifiants, protection des sessions, headers HTTP, contrôle des chemins.</text:p>
        </text:list-item>
        <text:list-item>
          <text:p text:style-name="P18">Déployabilité : Docker + Gunicorn, configuration par variables d’environnement, SQLite.</text:p>
        </text:list-item>
        <text:list-item>
          <text:p text:style-name="P18">Maintenabilité : code structuré en couches, tests automatisés, documentation d’exploitation.</text:p>
        </text:list-item>
      </text:list>
      <text:h text:style-name="Heading_20_2" text:outline-level="2"><text:bookmark-start text:name="__RefHeading___Toc1097_2390793328"/><text:bookmark-start text:name="i.4-cahier-des-charges-et-matrice-des-exigences"/>2.4 Cahier des charges et planning<text:bookmark-end text:name="__RefHeading___Toc1097_2390793328"/><text:bookmark-end text:name="i.4-cahier-des-charges-et-matrice-des-exigences"/></text:h>
      <text:p text:style-name="First_20_paragraph">Le cahier des charges fourni par la DSI liste les exigences détaillées : gestion des sources et connecteurs, synchronisation et déduplication, suivi de fraîcheur, consultation web, sécurité, API et exploitation. L’état de livraison de ces exigences est dressé dans le bilan (section 4.1).</text:p>
      <text:p text:style-name="Text_20_body">Le projet a été planifié sur huit semaines : analyse (S1), architecture et modèle de données (S2), connecteurs et sources (S3), synchronisation et fraîcheur (S4), interface web (S5), sécurité et API (S6-S7), tests et documentation (S8).</text:p>
      <text:p text:style-name="Text_20_body">Le planning réalisé a suivi le planning prévisionnel dans ses grandes lignes. La partie sécurité et API a pris plus de temps que prévu : plus on développe de fonctionnalités manipulant des fichiers et des identifiants, plus les points à sécuriser s’accumulent. Ce décalage a été absorbé en jouant sur le périmètre plutôt que sur la qualité : certaines fonctionnalités avancées ont été documentées plutôt que finalisées, la dernière semaine restant consacrée, comme prévu, aux tests et à la documentation.</text:p>
      <text:h text:style-name="Heading_20_1" text:outline-level="1"><text:bookmark-start text:name="__RefHeading___Toc1099_2390793328"/><text:bookmark-start text:name="partie-ii-conception-et-réalisation"/>3. Conception et réalisation<text:bookmark-end text:name="__RefHeading___Toc1099_2390793328"/><text:bookmark-end text:name="partie-ii-conception-et-réalisation"/></text:h>
      <text:h text:style-name="Heading_20_2" text:outline-level="2"><text:bookmark-start text:name="__RefHeading___Toc1101_2390793328"/><text:bookmark-start text:name="ii.1-choix-technologiques-et-argumentation"/>3.1 Choix technologiques et argumentation<text:bookmark-end text:name="__RefHeading___Toc1101_2390793328"/><text:bookmark-end text:name="ii.1-choix-technologiques-et-argumentation"/></text:h>
      <text:p text:style-name="First_20_paragraph">Les choix techniques partent du cahier des charges et des contraintes d’exploitation. Chaque composant a été choisi après comparaison avec des alternatives plus lourdes ou moins adaptées au besoin.</text:p>
      <text:h text:style-name="Heading_20_3" text:outline-level="3"><text:bookmark-start text:name="__RefHeading___Toc1103_2390793328"/><text:bookmark-start text:name="backend-flask"/><text:soft-page-break/>Backend : Flask<text:bookmark-end text:name="__RefHeading___Toc1103_2390793328"/><text:bookmark-end text:name="backend-flask"/></text:h>
      <text:p text:style-name="First_20_paragraph">Le besoin était une application web interne à maintenir par une DSI, pas un service haute disponibilité. Flask correspondait : léger, rendu HTML côté serveur via Jinja natif, déploiement simple derrière Gunicorn. Django aurait apporté plus - administration, ORM, structure imposée - mais précisément ce surplus était un coût sans contrepartie pour ce périmètre. FastAPI aurait été pertinent pour une API principalement asynchrone ; moins pour une application dont l’interface web reste le cas d’usage principal.</text:p>
      <text:h text:style-name="Heading_20_3" text:outline-level="3"><text:bookmark-start text:name="__RefHeading___Toc1105_2390793328"/><text:bookmark-start text:name="base-de-données-sqlite-via-sqlalchemy"/>Base de données : SQLite via SQLAlchemy<text:bookmark-end text:name="__RefHeading___Toc1105_2390793328"/><text:bookmark-end text:name="base-de-données-sqlite-via-sqlalchemy"/></text:h>
      <text:p text:style-name="First_20_paragraph">SQLite en mode WAL est embarqué dans Python, ne nécessite aucune installation et se sauvegarde par simple copie de fichier - trois avantages concrets pour un déploiement hospitalier sans DBA dédié. Ses limites d’écritures concurrentes ne sont pas un problème ici : le volume attendu reste faible (quelques synchronisations planifiées, des consultations web, des opérations d’administration). Et si ce volume devait croître, SQLAlchemy laisse ouverte la migration vers PostgreSQL sans réécrire la couche de données.</text:p>
      <text:h text:style-name="Heading_20_3" text:outline-level="3"><text:bookmark-start text:name="__RefHeading___Toc1107_2390793328"/><text:bookmark-start text:name="file-de-jobs-threadpoolexecutor"/>File de jobs : ThreadPoolExecutor<text:bookmark-end text:name="__RefHeading___Toc1107_2390793328"/><text:bookmark-end text:name="file-de-jobs-threadpoolexecutor"/></text:h>
      <text:p text:style-name="First_20_paragraph">Un <text:span text:style-name="Source_5f_Text">ThreadPoolExecutor</text:span> interne suffit pour quelques dizaines de synchronisations par jour - sans dépendance supplémentaire. Celery ou RQ offriraient une meilleure persistance des jobs et une reprise propre après redémarrage, mais au prix d’un composant supplémentaire (Redis) et d’un worker séparé à opérer. Ce coût n’était pas justifié pour ce périmètre. La contrepartie - un job perdu si le conteneur s’arrête en pleine synchronisation - est assumée et documentée côté exploitation (section 3.9).</text:p>
      <text:h text:style-name="Heading_20_3" text:outline-level="3"><text:bookmark-start text:name="__RefHeading___Toc1109_2390793328"/><text:bookmark-start text:name="chiffrement-des-identifiants-fernet"/>Chiffrement des identifiants : Fernet<text:bookmark-end text:name="__RefHeading___Toc1109_2390793328"/><text:bookmark-end text:name="chiffrement-des-identifiants-fernet"/></text:h>
      <text:p text:style-name="First_20_paragraph">Fernet fournit un chiffrement symétrique authentifié avec HMAC-SHA256 intégré. La bibliothèque est maintenue, documentée et évite d’implémenter soi-même AES-CBC, exercice où les erreurs sont faciles sur des points sensibles comme le vecteur d’initialisation ou le code d’authentification. Les sources étant déclarées dynamiquement depuis l’interface, <text:soft-page-break/>leurs identifiants doivent être stockés en base ; les chiffrer avec une clé conservée hors de la base garantit qu’une copie du fichier SQLite seule ne divulgue aucun identifiant.</text:p>
      <text:h text:style-name="Heading_20_2" text:outline-level="2"><text:bookmark-start text:name="__RefHeading___Toc1111_2390793328"/><text:bookmark-start text:name="ii.2-architecture-applicative"/>3.2 Architecture applicative<text:bookmark-end text:name="__RefHeading___Toc1111_2390793328"/><text:bookmark-end text:name="ii.2-architecture-applicative"/></text:h>
      <text:p text:style-name="First_20_paragraph">Arche est un monolithe Flask - une seule application déployée d’un bloc - organisé en couches distinctes. Ce découpage en couches n’est pas anodin : au départ, les premières routes mélangeaient logique d’accès réseau, règles de stockage et rendu HTML - ce qui rendait les tests impossibles et les bugs difficiles à isoler. Séparer les couches a été la première décision structurelle du projet.</text:p>
      <text:p text:style-name="Text_20_body">La figure 2 positionne Arche entre les sources hétérogènes, les utilisateurs web et les clients API.</text:p>
      <text:p text:style-name="FigureWithCaption"><draw:frame draw:style-name="fr2" draw:name="img2" text:anchor-type="as-char" svg:width="16.002cm" style:rel-width="100%" svg:height="10.668cm" style:rel-height="scale" draw:z-index="1"><draw:image xlink:href="Pictures/100000000000060000000400365D767B.png" xlink:type="simple" xlink:show="embed" xlink:actuate="onLoad" draw:mime-type="image/png"/></draw:frame></text:p>
      <text:p text:style-name="FigureCaption">Figure 2 : Architecture applicative d’Arche : couches Flask, services et stockage.</text:p>
      <text:p text:style-name="Text_20_body">Les routes HTTP (<text:span text:style-name="Source_5f_Text">app/routes/</text:span>) se limitent à l’authentification, à la lecture des paramètres, à la délégation aux services et au rendu. Les services (<text:span text:style-name="Source_5f_Text">app/services/</text:span>) portent la logique métier : synchronisation, purge, jobs de fond, notifications, LDAP, connecteurs. Les modèles <text:soft-page-break/>SQLAlchemy (<text:span text:style-name="Source_5f_Text">app/models/</text:span>) définissent le schéma de données et les invariants. Les utilitaires (<text:span text:style-name="Source_5f_Text">app/utils/</text:span>) fournissent les fonctions transverses : sécurité des chemins, chiffrement, sanitisation, décorateurs de permissions.</text:p>
      <text:p text:style-name="Text_20_body">Le modèle de données place <text:span text:style-name="Source_5f_Text">Source</text:span> et <text:span text:style-name="Source_5f_Text">Document</text:span> au centre du flux, liés par une relation un-à-plusieurs. Les autres entités (<text:span text:style-name="Source_5f_Text">Journal</text:span>, <text:span text:style-name="Source_5f_Text">BackgroundJob</text:span>, <text:span text:style-name="Source_5f_Text">User</text:span>, <text:span text:style-name="Source_5f_Text">Role</text:span>, <text:span text:style-name="Source_5f_Text">APIToken</text:span>) couvrent l’exploitation, le suivi des jobs et la sécurité.</text:p>
      <text:h text:style-name="Heading_20_3" text:outline-level="3"><text:bookmark-start text:name="__RefHeading___Toc1113_2390793328"/><text:bookmark-start text:name="les-jobs-planifiés-trois-leçons-sur-la-concurrence"/>Les jobs planifiés : trois leçons sur la concurrence<text:bookmark-end text:name="__RefHeading___Toc1113_2390793328"/><text:bookmark-end text:name="les-jobs-planifiés-trois-leçons-sur-la-concurrence"/></text:h>
      <text:p text:style-name="First_20_paragraph">Cette architecture a été mise à l’épreuve par les jobs planifiés. APScheduler exécute chaque tâche périodique - synchronisation par source, purge à 2 h et nettoyage de la corbeille à 3 h (deux mécanismes détaillés en section 3.4), rapport de conformité à 8 h (un état quotidien de la fraîcheur du parc documentaire) - dans un thread séparé du processus Flask. Cette cohabitation entre threads de fond et requêtes web m’a confronté à trois problèmes successifs.</text:p>
      <text:p text:style-name="Text_20_body">Le premier est apparu dès le premier essai : <text:span text:style-name="Source_5f_Text">RuntimeError: Working outside of application context</text:span>. Le même code de service fonctionnait parfaitement appelé depuis une route web, et plantait systématiquement appelé par le scheduler. En lisant la documentation de Flask, j’ai compris que la configuration et la session de base de données sont attachées à un <text:span text:style-name="T6">contexte d’application</text:span> que les requêtes web reçoivent automatiquement - mais pas les threads créés par APScheduler. La correction consiste à envelopper le corps de chaque job dans <text:span text:style-name="Source_5f_Text">with app.app_context():</text:span> (<text:span text:style-name="Source_5f_Text">app/scheduler/tasks.py</text:span>). Une ligne, mais elle m’a obligé à comprendre comment Flask isole réellement ses requêtes, ce que l’usage habituel du framework masque complètement.</text:p>
      <text:p text:style-name="Text_20_body">Le deuxième problème était un chevauchement. En testant avec une fréquence de synchronisation volontairement courte (une minute) et une source lente, le job suivant démarrait avant la fin du précédent : deux threads synchronisaient la même source en parallèle, avec des écritures concurrentes sur les mêmes lignes en base. APScheduler fournit exactement les garde-fous nécessaires : <text:span text:style-name="Source_5f_Text">max_instances=1</text:span> interdit deux exécutions simultanées du même job, et <text:span text:style-name="Source_5f_Text">misfire_grace_time=60</text:span> autorise un déclenchement en retard plutôt qu’une exécution de rattrapage en rafale. J’ai aussi ajouté une garde <text:span text:style-name="Source_5f_Text">if _scheduler.running: return</text:span> au démarrage, après avoir constaté en développement que le rechargeur automatique de Flask créait deux processus - et donc deux schedulers exécutant chaque synchronisation en double.</text:p>
      <text:p text:style-name="Text_20_body"><text:soft-page-break/>Le troisième touchait SQLite. Lors des premiers tests avec une synchronisation planifiée active et l’interface ouverte en parallèle, certaines requêtes échouaient avec <text:span text:style-name="Source_5f_Text">sqlite3.OperationalError: database is locked</text:span> : le thread du scheduler écrivait pendant qu’une requête web lisait. Plutôt que de remettre en cause le choix de SQLite (section 3.1), j’ai activé le mode WAL à l’ouverture de chaque connexion (<text:span text:style-name="Source_5f_Text">PRAGMA journal_mode=WAL</text:span> dans <text:span text:style-name="Source_5f_Text">app/__init__.py</text:span>). Dans ce mode, l’écriture se fait dans un journal séparé et ne bloque plus les lectures - ce qui correspond exactement à notre profil d’usage : des écritures occasionnelles (les jobs), des lectures fréquentes (l’interface).</text:p>
      <text:p text:style-name="Text_20_body">Ces fondations posées - couches séparées, jobs maîtrisés, base fiabilisée -, le cœur fonctionnel restait à construire : la collecte des documents elle-même.</text:p>
      <text:h text:style-name="Heading_20_2" text:outline-level="2"><text:bookmark-start text:name="__RefHeading___Toc1115_2390793328"/><text:bookmark-start text:name="ii.3-sources-et-synchronisation"/>3.3 Sources et synchronisation<text:bookmark-end text:name="__RefHeading___Toc1115_2390793328"/><text:bookmark-end text:name="ii.3-sources-et-synchronisation"/></text:h>
      <text:p text:style-name="First_20_paragraph">Une source décrit l’origine des PDF : protocole (<text:span text:style-name="Source_5f_Text">sftp</text:span>, <text:span text:style-name="Source_5f_Text">smb</text:span>, <text:span text:style-name="Source_5f_Text">local</text:span>), adresse réseau, chemin distant, identifiants chiffrés, filtres, seuils de fraîcheur et durée de rétention. Dans le code, les identifiants sont manipulés via les propriétés Python <text:span text:style-name="Source_5f_Text">login</text:span> et <text:span text:style-name="Source_5f_Text">mot_de_passe</text:span> de <text:span text:style-name="Source_5f_Text">Source</text:span> ; les colonnes physiques en base stockent les valeurs chiffrées par Fernet.</text:p>
      <text:p text:style-name="Text_20_body">Le service <text:span text:style-name="Source_5f_Text">app/services/sync_service.py</text:span> applique la même logique à tous les protocoles : seul le connecteur (inventaire et téléchargement) change. Cette partie est celle qui a connu le plus d’itérations pendant le stage, et c’est en la racontant dans l’ordre qu’on comprend le mieux sa forme finale.</text:p>
      <text:p text:style-name="Text_20_body"><text:span text:style-name="T5">Première version : correcte mais inutilisable.</text:span> Ma première implémentation était directe : télécharger chaque fichier distant, calculer son hash SHA-256, le comparer à celui stocké en base, et ne remplacer la copie locale que si le contenu avait changé. Fonctionnellement, rien à redire. Mais en testant avec une source d’une centaine de PDF, chaque synchronisation re-téléchargeait l’intégralité des fichiers - y compris ceux inchangés depuis des semaines - car il faut posséder un fichier pour le hacher. La déduplication arrivait trop tard dans la chaîne. Face à l’objectif du cahier des charges (500 PDF en moins de 5 minutes) et à des sources accessibles via le réseau hospitalier, cette approche ne tenait pas.</text:p>
      <text:p text:style-name="Text_20_body"><text:span text:style-name="T5">Deuxième version : déduplication à deux niveaux.</text:span> La solution a été d’exploiter les métadonnées que les protocoles SFTP et SMB fournissent gratuitement lors de l’inventaire, <text:soft-page-break/>avant tout téléchargement : la taille et la date de modification. Si les deux correspondent à ce qui est enregistré en base, le fichier est ignoré d’emblée. Le hash SHA-256 ne sert plus qu’en confirmation après téléchargement, pour éviter une écriture inutile quand un fichier a été re-daté sans être modifié (ce qui arrive, par exemple, après une copie de dossier côté serveur). Le coût réseau d’une synchronisation devient ainsi proportionnel à ce qui a <text:span text:style-name="T6">changé</text:span>, et non à la taille totale de la source.</text:p>
      <text:p text:style-name="Text_20_body"><text:span text:style-name="T5">Le bug des deux secondes.</text:span> Ce pré-filtre a immédiatement fait apparaître un bug déroutant : certains fichiers - toujours les mêmes - étaient re-téléchargés à chaque synchronisation alors qu’ils n’avaient pas changé. En journalisant les dates comparées, j’ai constaté des écarts d’une seconde entre la date stockée en base et la date annoncée par le serveur. L’explication m’a demandé quelques recherches : plusieurs systèmes de fichiers et serveurs SMB stockent les dates de modification avec une granularité de deux secondes ; la date est arrondie, et l’arrondi peut différer entre ce que le serveur annonce et ce que l’on a enregistré. Ma comparaison stricte échouait donc en permanence pour ces fichiers. La correction tient en une condition : tolérer un écart inférieur à deux secondes.</text:p>
      <text:p text:style-name="Preformatted_20_Text"># sync_service.py - pré-filtre avant téléchargement (simplifié)</text:p>
      <text:p text:style-name="Preformatted_20_Text">if doc and doc.taille_octets == f_distant.taille:</text:p>
      <text:p text:style-name="Preformatted_20_Text"><text:s text:c="4"/>doc_mtime = _as_utc(doc.date_modification_source)</text:p>
      <text:p text:style-name="Preformatted_20_Text"><text:s text:c="4"/>if doc_mtime:</text:p>
      <text:p text:style-name="Preformatted_20_Text"><text:s text:c="8"/>ecart = abs((doc_mtime - f_distant.date_modification).total_seconds())</text:p>
      <text:p text:style-name="Preformatted_20_Text"><text:s text:c="8"/>if ecart &lt; 2: <text:s/># tolérance : granularité des dates SMB/FAT</text:p>
      <text:p text:style-name="Preformatted_20_Text"><text:s text:c="12"/>return "ignore" <text:s/># métadonnées identiques : pas de téléchargement</text:p>
      <text:p text:style-name="First_20_paragraph"><text:span text:style-name="T5">Les fuseaux horaires.</text:span> En branchant le connecteur SFTP, la comparaison ci-dessus a levé une erreur que je ne connaissais pas : <text:span text:style-name="Source_5f_Text">TypeError: can't subtract offset-naive and offset-aware datetimes</text:span>. Paramiko renvoie des dates « naïves » (sans information de fuseau horaire), alors que l’application travaille avec des dates UTC « aware » ; Python refuse de soustraire les deux, et c’est une bonne chose - le résultat serait ambigu. J’ai adopté une règle simple pour tout le projet : toutes les dates sont stockées et comparées en UTC, la conversion vers l’heure locale n’intervient qu’à l’affichage. Un petit utilitaire normalise les dates entrantes :</text:p>
      <text:p text:style-name="Preformatted_20_Text">def _as_utc(dt: datetime | None) -&gt; datetime | None:</text:p>
      <text:p text:style-name="Preformatted_20_Text"><text:s text:c="4"/>if dt is None:</text:p>
      <text:p text:style-name="Preformatted_20_Text"><text:s text:c="8"/>return None</text:p>
      <text:p text:style-name="Preformatted_20_Text"><text:s text:c="4"/>return dt if dt.tzinfo else dt.replace(tzinfo=timezone.utc)</text:p>
      <text:p text:style-name="First_20_paragraph"><text:span text:style-name="T5">Écriture contrôlée.</text:span> Le téléchargement passe par un fichier temporaire créé dans le dossier cible, déplacé vers son nom définitif seulement une fois complet, et supprimé en cas <text:soft-page-break/>d’exception. Sans cette précaution, une coupure réseau en milieu de transfert laisserait un PDF tronqué qui serait servi tel quel à l’utilisateur - précisément le genre de défaillance silencieuse qu’un outil de continuité d’activité ne peut pas se permettre. Le calcul du hash lui-même lit le fichier par blocs de 64 Ko plutôt qu’en une fois : certains PDF de procédures sont des scans de plusieurs dizaines de mégaoctets, et <text:span text:style-name="Source_5f_Text">sha256(f.read())</text:span> aurait chargé chacun intégralement en mémoire.</text:p>
      <text:p text:style-name="Text_20_body">La figure 3 résume la chaîne complète : inventaire, sécurisation du nom, les deux niveaux de déduplication, écriture contrôlée et journalisation de chaque issue (copié, ignoré, erreur).</text:p>
      <text:p text:style-name="FigureWithCaption"><draw:frame draw:style-name="fr2" draw:name="img3" text:anchor-type="as-char" svg:width="16.002cm" style:rel-width="100%" svg:height="4.436cm" style:rel-height="scale" draw:z-index="2"><draw:image xlink:href="Pictures/1000000000000C540000036BDC3B4453.png" xlink:type="simple" xlink:show="embed" xlink:actuate="onLoad" draw:mime-type="image/png"/></draw:frame></text:p>
      <text:p text:style-name="FigureCaption">Figure 3 : Flux de synchronisation d’un document PDF : déduplication à deux niveaux et écriture contrôlée.</text:p>
      <text:p text:style-name="Text_20_body"><text:span text:style-name="T5">Les noms de fichiers, une entrée comme une autre.</text:span> Le point le plus sensible de cette chaîne concerne les noms de fichiers distants. Un nom ne peut pas être utilisé tel quel : un fichier nommé <text:span text:style-name="Source_5f_Text">../secret.pdf</text:span> sur un serveur compromis doit être refusé avant tout stockage local. Ma première protection s’appuyait sur <text:span text:style-name="Source_5f_Text">os.path.basename()</text:span> pour ne conserver que le nom - jusqu’à ce qu’un test m’apprenne que sous Linux, <text:span text:style-name="Source_5f_Text">basename</text:span> ne coupe que sur les <text:span text:style-name="Source_5f_Text">/</text:span> : un nom contenant des antislashs Windows (<text:span text:style-name="Source_5f_Text">..\..\fichier.pdf</text:span>), tout à fait plausible venant d’un serveur SMB, traversait le filtre intact. La fonction <text:span text:style-name="Source_5f_Text">nom_fichier_sur()</text:span> (<text:span text:style-name="Source_5f_Text">app/utils/files.py</text:span>) normalise donc d’abord les <text:span text:style-name="Source_5f_Text">\</text:span> en <text:span text:style-name="Source_5f_Text">/</text:span> avant d’extraire le nom, et le confinement par <text:span text:style-name="Source_5f_Text">realpath</text:span> + <text:span text:style-name="Source_5f_Text">commonpath</text:span> vérifie en seconde ligne de défense que le chemin final reste bien sous le répertoire de stockage. Cette double vérification s’applique partout où un chemin est manipulé : synchronisation, téléchargement, ZIP, purge et restauration depuis la corbeille.</text:p>
      <text:p text:style-name="Text_20_body">La synchronisation répond à la question « comment collecter efficacement ». Restait la question symétrique, tout aussi importante pour la DSI : que deviennent les documents qui vieillissent ?</text:p>
      <text:h text:style-name="Heading_20_2" text:outline-level="2"><text:bookmark-start text:name="__RefHeading___Toc1117_2390793328"/><text:bookmark-start text:name="ii.4-fraîcheur-purge-et-corbeille"/><text:soft-page-break/>3.4 Fraîcheur, purge et corbeille<text:bookmark-end text:name="__RefHeading___Toc1117_2390793328"/><text:bookmark-end text:name="ii.4-fraîcheur-purge-et-corbeille"/></text:h>
      <text:p text:style-name="First_20_paragraph">Chaque document porte un statut calculé à partir de son âge et des seuils configurés sur sa source. La progression est intentionnellement graduelle : <text:span text:style-name="Source_5f_Text">ok</text:span> (document récent), <text:span text:style-name="Source_5f_Text">avertissement</text:span> (à surveiller), <text:span text:style-name="Source_5f_Text">critique</text:span> (action requise), puis <text:span text:style-name="Source_5f_Text">purge</text:span> (rétention dépassée). Cette dégradation laisse du temps pour réagir avant qu’un document ne disparaisse. Les seuils sont paramétrables par source, ce qui permet d’appliquer des politiques différentes selon la criticité des procédures concernées. La purge répond quant à elle à un risque métier réel : en milieu hospitalier, appliquer une procédure obsolète peut être plus dangereux que de constater son absence ; écarter un document que sa source ne maintient plus incite le service responsable à en republier une version à jour.</text:p>
      <text:p text:style-name="Text_20_body">La suppression elle-même n’est jamais immédiate. Quand un document dépasse son seuil de rétention, il est déplacé vers le dossier <text:span text:style-name="Source_5f_Text">_corbeille</text:span> et son statut passe à <text:span text:style-name="Source_5f_Text">purge</text:span>. Un nettoyage définitif intervient ensuite après une durée configurable (paramètre <text:span text:style-name="Source_5f_Text">CORBEILLE_RETENTION_JOURS</text:span>). Ce fonctionnement en deux temps limite le risque d’erreur irréversible en cas de mauvais paramétrage. La figure 4 illustre l’ensemble de ce cycle de vie et les seuils de transition.</text:p>
      <text:p text:style-name="FigureWithCaption"><text:soft-page-break/><draw:frame draw:style-name="fr2" draw:name="img4" text:anchor-type="as-char" svg:width="16.002cm" style:rel-width="100%" svg:height="10.668cm" style:rel-height="scale" draw:z-index="3"><draw:image xlink:href="Pictures/10000000000006000000040047D08FDA.png" xlink:type="simple" xlink:show="embed" xlink:actuate="onLoad" draw:mime-type="image/png"/></draw:frame></text:p>
      <text:p text:style-name="FigureCaption">Figure 4 : Cycle de vie d’un document PDF : états de fraîcheur, transitions et chronologie de purge.</text:p>
      <text:p text:style-name="Text_20_body">Ces mécanismes tournent en arrière-plan ; pour l’utilisateur, ils se résument à un badge de couleur sur chaque document. C’est l’interface web qui rend ce travail visible.</text:p>
      <text:h text:style-name="Heading_20_2" text:outline-level="2"><text:bookmark-start text:name="__RefHeading___Toc1119_2390793328"/><text:bookmark-start text:name="ii.5-interface-web-et-parcours-utilisateur"/>3.5 Interface web et parcours utilisateur<text:bookmark-end text:name="__RefHeading___Toc1119_2390793328"/><text:bookmark-end text:name="ii.5-interface-web-et-parcours-utilisateur"/></text:h>
      <text:p text:style-name="First_20_paragraph">L’interface est rendue côté serveur avec Jinja2 et Bootstrap 5. Ce choix a une raison pratique : un développeur Python de la DSI doit pouvoir maintenir l’interface sans maîtriser un framework JavaScript. Les écrans de gestion interne n’exigent pas de réactivité temps réel. L’interface couvre la connexion, le tableau de bord, la gestion des sources, la synchronisation, la consultation des documents - avec un viewer PDF intégré qui permet de lire un document sans le télécharger -, les journaux et l’administration.</text:p>
      <text:p text:style-name="Text_20_body">Le tableau de bord affiche les indicateurs utiles à l’exploitation : nombre de documents, sources actives, dernière synchronisation, espace utilisé, activité récente et répartition par source.</text:p>
      <text:p text:style-name="Text_20_body"><text:soft-page-break/>L’interface permet aussi d’exporter une sélection de documents sous forme d’archive ZIP. Cet export est limité à 100 documents et 500 Mo : ce plafond évite de générer depuis l’interface une réponse HTTP trop volumineuse, qui pourrait saturer la mémoire du serveur ou la connexion de l’utilisateur.</text:p>
      <text:p text:style-name="Text_20_body">L’interface répond ainsi à l’usage humain. Pour les usages programmatiques - supervision par les outils de la DSI, scripts d’exploitation -, l’application expose une API REST.</text:p>
      <text:h text:style-name="Heading_20_2" text:outline-level="2"><text:bookmark-start text:name="__RefHeading___Toc1121_2390793328"/><text:bookmark-start text:name="ii.6-api-rest"/>3.6 API REST<text:bookmark-end text:name="__RefHeading___Toc1121_2390793328"/><text:bookmark-end text:name="ii.6-api-rest"/></text:h>
      <text:p text:style-name="First_20_paragraph">L’API v1 est définie dans <text:span text:style-name="Source_5f_Text">app/routes/api.py</text:span> et documentée via OpenAPI dans <text:span text:style-name="Source_5f_Text">app/api/openapi.py</text:span>. Elle expose un healthcheck public, des statistiques agrégées, la liste et le détail des sources, le déclenchement d’une synchronisation, le statut d’un job de fond, la liste et le détail des documents, ainsi que le téléchargement d’un document.</text:p>
      <text:p text:style-name="Text_20_body">L’API n’est pas un CRUD complet - et c’est un choix délibéré. La création et la suppression de sources sont des opérations rares, réalisées par des administrateurs qui bénéficient des confirmations visuelles de l’interface web. L’API se concentre sur la consultation et le suivi, les vrais cas d’usage fréquents pour un outil de monitoring externe. Les décorateurs dans <text:span text:style-name="Source_5f_Text">app/utils/decorators.py</text:span> et les tests dans <text:span text:style-name="Source_5f_Text">tests/test_api_permissions.py</text:span> garantissent que les deux modes d’accès (session web et token Bearer) appliquent les mêmes règles de permissions, sans divergence silencieuse.</text:p>
      <text:p text:style-name="Text_20_body">Un exemple d’usage typique - déclencher une synchronisation puis suivre son job :</text:p>
      <text:p text:style-name="Preformatted_20_Text">curl -X POST -H "Authorization: Bearer &lt;token&gt;" \</text:p>
      <text:p text:style-name="Preformatted_20_Text"><text:s text:c="5"/>http://localhost:5000/api/v1/sources/1/sync</text:p>
      <text:p text:style-name="Preformatted_20_Text">curl -H "Authorization: Bearer &lt;token&gt;" \</text:p>
      <text:p text:style-name="Preformatted_20_Text"><text:s text:c="5"/>http://localhost:5000/api/v1/jobs/&lt;job-id&gt;</text:p>
      <text:h text:style-name="Heading_20_2" text:outline-level="2"><text:bookmark-start text:name="__RefHeading___Toc1123_2390793328"/><text:bookmark-start text:name="ii.7-sécurité"/>3.7 Sécurité<text:bookmark-end text:name="__RefHeading___Toc1123_2390793328"/><text:bookmark-end text:name="ii.7-sécurité"/></text:h>
      <text:p text:style-name="First_20_paragraph">La sécurité d’Arche repose sur plusieurs contrôles complémentaires. Aucun d’eux ne suffit seul ; l’objectif est de limiter la surface d’attaque sur les accès web, l’API, les fichiers et les exports. Les contrôles peuvent être regroupés par type de menace.</text:p>
      <text:p text:style-name="Text_20_body"><text:span text:style-name="T5">Contre l’usurpation d’identité</text:span> : Flask-Login gère les sessions côté serveur, avec mots de passe hachés en bcrypt (coût 12) et décorateurs <text:span text:style-name="Source_5f_Text">@require_permission</text:span> sur les routes sensibles. <text:soft-page-break/>L’authentification peut également être déléguée à l’annuaire LDAP de l’établissement, afin que les agents s’identifient avec leurs identifiants habituels. Les tokens Bearer sont stockés hachés en base, révocables immédiatement, et peuvent porter des permissions restreintes. Dans les deux cas - rôles comme tokens -, les droits sont limités au nécessaire : le rôle « Opérateur », par exemple, n’inclut pas la permission de supprimer des sources.</text:p>
      <text:p text:style-name="Text_20_body"><text:span text:style-name="T5">Contre les attaques par le navigateur</text:span> : Flask-WTF pose des jetons CSRF sur tous les formulaires qui modifient des données, ce qui empêche un attaquant de déclencher une action en s’appuyant sur la session ouverte d’un utilisateur. Les en-têtes HTTP (<text:span text:style-name="Source_5f_Text">X-Content-Type-Options: nosniff</text:span>, <text:span text:style-name="Source_5f_Text">X-Frame-Options: SAMEORIGIN</text:span>, CSP avec nonce dynamique sur les scripts) réduisent les vecteurs XSS et clickjacking.</text:p>
      <text:p text:style-name="Text_20_body">La mise en place de la CSP a d’ailleurs été instructive : en l’activant, l’interface a cessé de fonctionner. Les quelques scripts inline des templates étaient bloqués exactement comme l’aurait été un script injecté par un attaquant - comportement attendu, puisque la CSP ne distingue pas le code légitime du code injecté : elle exige que le code légitime soit identifiable. Chaque réponse génère donc un nonce aléatoire, placé à la fois dans l’en-tête CSP et dans les balises <text:span text:style-name="Source_5f_Text">&lt;script&gt;</text:span> des templates ; un script dépourvu du nonce de la requête en cours est refusé par le navigateur.</text:p>
      <text:p text:style-name="Text_20_body"><text:span text:style-name="T5">Contre les attaques par le système de fichiers</text:span> : les identifiants des sources sont chiffrés avec Fernet avant stockage - la clé (<text:span text:style-name="Source_5f_Text">ENCRYPTION_KEY</text:span>) reste séparée de la clé de session et protégée par des permissions restreintes (<text:span text:style-name="Source_5f_Text">chmod 600</text:span>). Le confinement des chemins dans <text:span text:style-name="Source_5f_Text">app/utils/files.py</text:span> utilise <text:span text:style-name="Source_5f_Text">os.path.realpath</text:span> et <text:span text:style-name="Source_5f_Text">os.path.commonpath</text:span> pour garantir que tout chemin demandé reste sous le répertoire autorisé, y compris face aux liens symboliques ou aux chemins absolus injectés.</text:p>
      <text:p text:style-name="Text_20_body"><text:span text:style-name="T5">Contre les injections de formules</text:span> : les exports CSV/XLSX neutralisent les valeurs commençant par <text:span text:style-name="Source_5f_Text">=</text:span>, <text:span text:style-name="Source_5f_Text">+</text:span>, <text:span text:style-name="Source_5f_Text">-</text:span> ou <text:span text:style-name="Source_5f_Text">@</text:span>. Les notifications et rapports HTML échappent systématiquement les contenus insérés.</text:p>
      <text:h text:style-name="Heading_20_2" text:outline-level="2"><text:bookmark-start text:name="__RefHeading___Toc1125_2390793328"/><text:bookmark-start text:name="ii.8-tests-et-qualité"/>3.8 Tests et qualité<text:bookmark-end text:name="__RefHeading___Toc1125_2390793328"/><text:bookmark-end text:name="ii.8-tests-et-qualité"/></text:h>
      <text:p text:style-name="First_20_paragraph">La stratégie de test a privilégié la rapidité et la reproductibilité. Les tests utilisent SQLite en mémoire et un stockage temporaire ; le mode <text:span text:style-name="Source_5f_Text">JOBS_RUN_INLINE=true</text:span> exécute les jobs de <text:soft-page-break/>fond de façon synchrone. Ce mode est né d’un problème concret : mes premiers tests de synchronisation échouaient par intermittence, selon que le thread du job avait terminé ou non au moment de l’assertion. Plutôt que d’ajouter des attentes arbitraires (<text:span text:style-name="Source_5f_Text">sleep</text:span>) qui ralentissent la suite sans vraiment la fiabiliser, j’ai introduit ce mode qui exécute les jobs en ligne pendant les tests : les assertions deviennent déterministes. Résultat : une suite qui tourne en quelques secondes en CI, répartie en une vingtaine de fichiers couvrant les modèles, la synchronisation, la purge, les sources, les permissions API et web, la sécurité (traversée de chemin, injections), LDAP, SFTP, SMB, les exports, les notifications et les templates.</text:p>
      <text:p text:style-name="Text_20_body">La contrepartie est connue : ces tests ne prouvent pas la compatibilité avec les comportements réels de serveurs SFTP, SMB, LDAP ou SMTP. Une recette sur infrastructure réelle reste indispensable avant tout déploiement.</text:p>
      <text:p text:style-name="Text_20_body">La commande <text:span text:style-name="Source_5f_Text">make check</text:span> orchestre l’ensemble : Ruff (linter Python), pytest avec couverture, Bandit (analyse statique de sécurité), <text:span text:style-name="Source_5f_Text">pip-audit</text:span> (vulnérabilités des dépendances), un scan de secrets suivis par Git et une vérification des permissions du fichier <text:span text:style-name="Source_5f_Text">.env</text:span>.</text:p>
      <text:h text:style-name="Heading_20_2" text:outline-level="2"><text:bookmark-start text:name="__RefHeading___Toc1127_2390793328"/><text:bookmark-start text:name="ii.9-déploiement-et-exploitation"/>3.9 Déploiement et exploitation<text:bookmark-end text:name="__RefHeading___Toc1127_2390793328"/><text:bookmark-end text:name="ii.9-déploiement-et-exploitation"/></text:h>
      <text:p text:style-name="First_20_paragraph">Le dépôt contient un <text:span text:style-name="Source_5f_Text">Dockerfile</text:span>, un <text:span text:style-name="Source_5f_Text">docker-compose.yml</text:span>, un <text:span text:style-name="Source_5f_Text">entrypoint.sh</text:span> et les commandes Flask nécessaires à l’initialisation de la base.</text:p>
      <text:p text:style-name="Text_20_body">Variables minimales requises en production :</text:p>
      <text:p text:style-name="Preformatted_20_Text">SECRET_KEY=&lt;valeur aléatoire 32 octets&gt;</text:p>
      <text:p text:style-name="Preformatted_20_Text">ENCRYPTION_KEY=&lt;clé Fernet générée&gt;</text:p>
      <text:p text:style-name="Preformatted_20_Text">STORAGE_DIR=/chemin/vers/stockage</text:p>
      <text:p text:style-name="Preformatted_20_Text">FLASK_ENV=production</text:p>
      <text:p text:style-name="First_20_paragraph">Le déploiement cible passe par Docker (le lancement local hors conteneur est décrit dans le README) :</text:p>
      <text:p text:style-name="Preformatted_20_Text">docker compose build &amp;&amp; docker compose up -d</text:p>
      <text:p text:style-name="Preformatted_20_Text">docker compose exec web flask init-db</text:p>
      <text:p text:style-name="Preformatted_20_Text">docker compose exec web flask create-admin --username admin --password &lt;mot_de_passe&gt;</text:p>
      <text:p text:style-name="First_20_paragraph">Les jobs de fond s’exécutent dans un <text:span text:style-name="Source_5f_Text">ThreadPoolExecutor</text:span> interne. Un redémarrage du processus pendant une synchronisation peut laisser un job inachevé ; dans ce cas, un déclenchement manuel est nécessaire. C’est une limite connue et documentée - l’exploitant doit en être informé lors de la prise en main.</text:p>
      <text:h text:style-name="Heading_20_1" text:outline-level="1"><text:bookmark-start text:name="__RefHeading___Toc1129_2390793328"/><text:bookmark-start text:name="partie-iii-bilan-et-perspectives"/><text:soft-page-break/>4. Bilan et perspectives<text:bookmark-end text:name="__RefHeading___Toc1129_2390793328"/><text:bookmark-end text:name="partie-iii-bilan-et-perspectives"/></text:h>
      <text:h text:style-name="Heading_20_2" text:outline-level="2"><text:bookmark-start text:name="__RefHeading___Toc1131_2390793328"/><text:bookmark-start text:name="iii.1-résultats-obtenus"/>4.1 Résultats obtenus<text:bookmark-end text:name="__RefHeading___Toc1131_2390793328"/><text:bookmark-end text:name="iii.1-résultats-obtenus"/></text:h>
      <text:p text:style-name="First_20_paragraph">Arche couvre le périmètre principal du cahier des charges : une application web interne, conteneurisable, qui collecte des PDF depuis des sources SFTP, SMB et locales, calcule leur fraîcheur, permet leur consultation et trace les opérations.</text:p>
      <text:p text:style-name="Text_20_body">Sur les exigences du cahier des charges, l’essentiel est livré et validé par les tests : gestion des sources, synchronisation avec déduplication SHA-256, consultation (interface web, viewer PDF, export ZIP), sécurité (CSRF, CSP, Fernet, RBAC, confinement de chemins) et API REST. Deux points restent partiels : la purge est fonctionnelle mais ses réglages les plus fins (durées de rétention par source, délai de corbeille) n’ont pas tous été démontrés en recette ; l’API ne couvre pas le CRUD des sources. Trois points restent à valider sur infrastructure réelle : LDAP, SMTP, et le benchmark de performance à 500 PDF. Le projet est documenté pour permettre une reprise par la DSI sans dépendre de ma présence.</text:p>
      <text:h text:style-name="Heading_20_2" text:outline-level="2"><text:bookmark-start text:name="__RefHeading___Toc1133_2390793328"/><text:bookmark-start text:name="iii.2-perspectives-et-évolutions"/>4.2 Perspectives et évolutions<text:bookmark-end text:name="__RefHeading___Toc1133_2390793328"/><text:bookmark-end text:name="iii.2-perspectives-et-évolutions"/></text:h>
      <text:p text:style-name="First_20_paragraph"><text:span text:style-name="T5">Priorité haute</text:span> : valider les connecteurs sur infrastructure réelle (SFTP, SMB, LDAP, SMTP) et mesurer le benchmark 500 PDF en moins de 5 minutes avec un jeu de fichiers représentatif. C’est le prérequis à toute mise en service.</text:p>
      <text:p text:style-name="Text_20_body"><text:span text:style-name="T5">Priorité moyenne</text:span> : ajouter le CRUD des sources dans l’API REST (avec une politique d’autorisation à préciser) ; mettre en place une sauvegarde automatique de la base SQLite, du stockage PDF et du fichier <text:span text:style-name="Source_5f_Text">.env</text:span>.</text:p>
      <text:p text:style-name="Text_20_body"><text:span text:style-name="T5">Priorité basse</text:span> : envisager une migration PostgreSQL si les accès concurrents l’exigent ; faire réaliser un audit de sécurité externe une fois le périmètre de production figé.</text:p>
      <text:h text:style-name="Heading_20_2" text:outline-level="2"><text:bookmark-start text:name="__RefHeading___Toc1135_2390793328"/><text:bookmark-start text:name="iii.3-accompagnement-du-csu-lors-des-interventions"/>4.3 Accompagnement du CSU lors des interventions<text:bookmark-end text:name="__RefHeading___Toc1135_2390793328"/><text:bookmark-end text:name="iii.3-accompagnement-du-csu-lors-des-interventions"/></text:h>
      <text:p text:style-name="First_20_paragraph">Le bilan du stage ne se limite pas à l’application : en plus du développement d’Arche, j’ai accompagné des membres de la Cellule de Support aux Utilisateurs (CSU) lors d’interventions dans plusieurs services - sur site (bloc opératoire, urgences, unités <text:soft-page-break/>d’hospitalisation, services administratifs) quand une présence physique était nécessaire, à distance pour les incidents simples. Cette seconde mission m’a donné une vision directe du terrain que l’application devait servir.</text:p>
      <text:p text:style-name="Text_20_body">Le parc informatique hospitalier diffère d’un environnement d’entreprise classique : postes partagés entre plusieurs utilisateurs, politiques de sécurité strictes, accès aux applications métier (dossier patient informatisé, outils de prescription) contrôlés par profil et par service. J’ai participé à des dépannages de postes, des gestions de droits d’accès, des incidents d’impression et des rétablissements de connectivité réseau. La tension y est permanente : la sécurité doit rester stricte, mais l’usage doit rester simple pour des personnels dont l’informatique n’est pas le métier - un blocage banal sur un poste ou une imprimante peut désorganiser un service entier.</text:p>
      <text:h text:style-name="Heading_20_3" text:outline-level="3"><text:bookmark-start text:name="__RefHeading___Toc1137_2390793328"/><text:bookmark-start text:name="continuité-de-service-en-milieu-hospitalier"/>Continuité de service en milieu hospitalier<text:bookmark-end text:name="__RefHeading___Toc1137_2390793328"/><text:bookmark-end text:name="continuité-de-service-en-milieu-hospitalier"/></text:h>
      <text:p text:style-name="First_20_paragraph">Le contexte hospitalier se distingue surtout par la continuité de service : une panne informatique dans un service de soins peut perturber directement la prise en charge des patients, et les interventions du CSU prennent souvent un caractère urgent. Ces accompagnements ont rendu le besoin d’Arche très concret. Les modes dégradés ne sont pas une formalité documentaire : lors d’une intervention, j’ai vu une unité revenir aux formulaires papier à cause d’une indisponibilité temporaire des outils de prescription. C’est exactement le scénario que l’application sécurise, en garantissant un accès fiable, centralisé et à jour aux documents de modes dégradés.</text:p>
      <text:h text:style-name="Heading_20_3" text:outline-level="3"><text:bookmark-start text:name="__RefHeading___Toc1139_2390793328"/><text:bookmark-start text:name="relation-avec-les-utilisateurs-hospitaliers"/>Relation avec les utilisateurs hospitaliers<text:bookmark-end text:name="__RefHeading___Toc1139_2390793328"/><text:bookmark-end text:name="relation-avec-les-utilisateurs-hospitaliers"/></text:h>
      <text:p text:style-name="First_20_paragraph">Le personnel hospitalier (médecins, cadres de santé, infirmiers, secrétaires médicales, agents administratifs) a des niveaux d’aisance informatique très variables : il faut adapter le vocabulaire, reformuler concrètement et tenir compte de la pression du service. La qualité perçue d’une intervention tient autant à l’explication donnée qu’à la résolution technique. Cette observation a directement influencé la conception d’Arche : une application utilisée par du personnel non informaticien, souvent en contexte de panne, doit afficher des messages d’état compréhensibles et éviter les parcours inutiles.</text:p>
      <text:h text:style-name="Heading_20_1" text:outline-level="1"><text:bookmark-start text:name="__RefHeading___Toc1141_2390793328"/><text:bookmark-start text:name="difficultés-rencontrées"/><text:soft-page-break/>5. Difficultés rencontrées<text:bookmark-end text:name="__RefHeading___Toc1141_2390793328"/><text:bookmark-end text:name="difficultés-rencontrées"/></text:h>
      <text:p text:style-name="First_20_paragraph">Les difficultés techniques ponctuelles - séparation des routes et des services, contexte applicatif des threads, chevauchement des jobs, verrouillage SQLite, granularité des dates SMB, fuseaux horaires, traversée de chemin - ont été racontées dans la partie 3, au plus près des choix qu’elles ont provoqués. Cette section revient sur les difficultés transversales : celles qui ne se corrigent pas par un commit, mais qui ont structuré le déroulement du stage.</text:p>
      <text:p text:style-name="Text_20_body"><text:span text:style-name="T5">Mener deux missions de front.</text:span> Le stage ne se limitait pas au développement : les accompagnements du CSU occupaient une partie du temps, par nature imprévisible puisque dictée par les incidents. Il a fallu apprendre à protéger des plages de développement continues - une fonctionnalité comme la synchronisation supporte mal le morcellement - tout en restant disponible pour les interventions. Concrètement, cela a imposé les arbitrages de périmètre évoqués dans le planning (section 2.4) : documenter certaines fonctionnalités avancées plutôt que les finaliser, pour préserver la qualité du cœur livré.</text:p>
      <text:p text:style-name="Text_20_body"><text:span text:style-name="T5">Changer de posture sur la sécurité.</text:span> La difficulté la plus formatrice n’a pas été d’apprendre tel ou tel mécanisme (CSRF, CSP, Fernet), mais de changer de question : ne plus me demander « est-ce que ça marche ? » mais « comment cela peut-il être détourné ? ». Une application qui collecte des fichiers manipule en permanence des entrées non fiables - noms de fichiers distants, contenus exportés vers un tableur, chemins de téléchargement, tokens d’API. Chaque fonctionnalité ajoutée rouvrait la question pour un périmètre nouveau. C’est ce qui explique le débordement de la phase sécurité sur le planning prévisionnel : la charge de sécurisation croît avec le nombre de fonctionnalités, et je l’avais sous-estimée en début de stage.</text:p>
      <text:p text:style-name="Text_20_body"><text:span text:style-name="T5">Garantir les mêmes règles sur deux chemins d’accès.</text:span> Un cas particulier de cette vigilance mérite d’être isolé : l’interface web utilise des sessions avec CSRF, l’API des tokens Bearer sans CSRF, et ces deux chemins doivent appliquer exactement les mêmes permissions métier. Le risque insidieux était de durcir l’interface tout en laissant l’API contourner silencieusement certains contrôles. J’ai centralisé les vérifications dans des décorateurs réutilisables (<text:span text:style-name="Source_5f_Text">app/utils/decorators.py</text:span>) appliqués aux deux chemins, et verrouillé cette propriété par des tests dédiés (<text:span text:style-name="Source_5f_Text">tests/test_api_permissions.py</text:span>) - si quelqu’un fait diverger les deux chemins à l’avenir, un test échouera.</text:p>
      <text:p text:style-name="Text_20_body"><text:soft-page-break/><text:span text:style-name="T5">Tester sans l’infrastructure cible.</text:span> SFTP, SMB, LDAP et SMTP ne pouvaient pas être testés contre les vrais serveurs de l’établissement depuis mon environnement de développement. J’ai simulé les bibliothèques sous-jacentes (Paramiko, <text:span text:style-name="Source_5f_Text">smbprotocol</text:span>) avec <text:span text:style-name="Source_5f_Text">unittest.mock</text:span>, ce qui permet de tester de façon reproductible les succès, les erreurs réseau, les timeouts et les entrées dangereuses. La limite est connue et assumée : ces tests valident ma logique, pas la compatibilité réelle avec les serveurs de la DSI - c’est pourquoi la recette sur infrastructure réelle figure en tête des perspectives.</text:p>
      <text:p text:style-name="Text_20_body"><text:span text:style-name="T5">Estimer son propre travail.</text:span> Enfin, ce stage m’a confronté à la difficulté d’estimer. Le planning prévisionnel s’est avéré juste dans ses grandes lignes, mais systématiquement optimiste sur les finitions : un connecteur « qui marche » et un connecteur testé, sécurisé et journalisé ne représentent pas le même volume de travail. J’en retiens une règle pratique pour la suite : le dernier quart d’une fonctionnalité coûte aussi cher que les trois premiers.</text:p>
      <text:h text:style-name="Heading_20_1" text:outline-level="1"><text:bookmark-start text:name="__RefHeading___Toc1143_2390793328"/><text:bookmark-start text:name="conclusion"/>6. Conclusion<text:bookmark-end text:name="__RefHeading___Toc1143_2390793328"/><text:bookmark-end text:name="conclusion"/></text:h>
      <text:p text:style-name="First_20_paragraph">Arche centralise ce qui était dispersé : les PDF de modes dégradés, auparavant éparpillés sur des serveurs hétérogènes, sont maintenant collectés, dédupliqués et accessibles depuis un point d’accès unique. L’application présente les trois attributs non négociables en contexte HDS : elle est sécurisée (Fernet, CSRF, confinement des chemins), traçable (journaux de toutes les opérations) et fiable (copies locales disponibles même si la source est inaccessible).</text:p>
      <text:p text:style-name="Text_20_body">La réponse à la problématique tient en trois compromis assumés : la déduplication à deux niveaux garantit la fraîcheur documentaire sans saturer le réseau ; le double modèle d’accès session/token, appuyé sur les journaux, impose la sécurité et la traçabilité attendues en contexte HDS sans compliquer la consultation ; et la pile technique volontairement réduite reste exploitable durablement par la DSI.</text:p>
      <text:p text:style-name="Text_20_body">Les choix techniques - Flask, SQLite, APScheduler, Fernet, ThreadPoolExecutor, Docker - ont été guidés par le cahier des charges : simplicité de déploiement, environnement hospitalier, volume attendu limité. L’objectif n’était pas de multiplier les composants, mais de livrer une base maintenable. Chaque choix a été comparé aux alternatives disponibles et ses limites sont documentées.</text:p>
      <text:p text:style-name="Text_20_body"><text:soft-page-break/>Le travail de sécurité a été plus long que prévu, et c’est compréhensible : une application de collecte de fichiers manipule rapidement des entrées non fiables - noms de fichiers distants, exports tableur, formulaires web, tokens API, chemins de téléchargement. Le confinement des chemins, la sanitisation des exports, le CSRF, la CSP et le double modèle d’accès session/token ont donc pris une place importante dans le projet.</text:p>
      <text:p text:style-name="Text_20_body">Sur le plan personnel, ce stage m’a davantage appris par ses problèmes que par ce qui a fonctionné du premier coup : un <text:span text:style-name="Source_5f_Text">TypeError</text:span> sur des fuseaux horaires, une base verrouillée par un thread ou un job exécuté en double obligent à comprendre ce que les frameworks font réellement sous la surface, là où l’usage ordinaire permet de l’ignorer. C’est cette compréhension - plus que la liste des fonctionnalités livrées - qui me semble constituer l’acquis principal de ces huit semaines.</text:p>
      <text:p text:style-name="Text_20_body">La prochaine étape est une recette par la DSI sur l’infrastructure réelle du Centre Antoine Lacassagne. Elle permettra de valider les connecteurs, de mesurer les performances sur des fichiers représentatifs et d’ajuster les paramètres de rétention avant une mise en service opérationnelle - ce que ce stage n’a pas pu faire, mais a préparé.</text:p>
      <text:h text:style-name="Heading_20_1" text:outline-level="1"><text:bookmark-start text:name="__RefHeading___Toc1157_2390793328"/><text:bookmark-start text:name="table-des-illustrations"/>Table des illustrations<text:bookmark-end text:name="__RefHeading___Toc1157_2390793328"/><text:bookmark-end text:name="table-des-illustrations"/></text:h>
      <text:p text:style-name="First_20_paragraph">Figure 1 : Situation avant et après Arche : dispersion des sources et accès centralisé …………………… section 1</text:p>
      <text:p text:style-name="Text_20_body">Figure 2 : Architecture applicative d’Arche : couches Flask, services et stockage ……………………….. section 3.2</text:p>
      <text:p text:style-name="Text_20_body">Figure 3 : Flux de synchronisation d’un document PDF : déduplication à deux niveaux et écriture contrôlée …… section 3.3</text:p>
      <text:p text:style-name="Text_20_body">Figure 4 : Cycle de vie d’un document PDF : états de fraîcheur, transitions et chronologie de purge ……………….. section 3.4</text:p>
      <text:h text:style-name="Heading_20_1" text:outline-level="1"><text:bookmark-start text:name="__RefHeading___Toc1085_2390793328"/><text:bookmark-start text:name="glossaire"/>Glossaire<text:bookmark-end text:name="__RefHeading___Toc1085_2390793328"/><text:bookmark-end text:name="glossaire"/></text:h>
      <text:p text:style-name="Text_20_body"><text:span text:style-name="T5">API REST</text:span> : interface de programmation exposée via HTTP, qui permet à d’autres logiciels (supervision, scripts) d’interroger l’application sans passer par l’interface web.</text:p>
      <text:p text:style-name="Text_20_body"><text:soft-page-break/><text:span text:style-name="T5">CI</text:span> : Continuous Integration (intégration continue) : exécution automatique de la suite de tests à chaque modification du code.</text:p>
      <text:p text:style-name="Text_20_body"><text:span text:style-name="T5">CRUD</text:span> : Create, Read, Update, Delete : les quatre opérations élémentaires sur une donnée (créer, lire, modifier, supprimer).</text:p>
      <text:p text:style-name="Text_20_body"><text:span text:style-name="T5">CSP</text:span> : Content Security Policy : en-tête HTTP limitant les ressources chargées par le navigateur, ce qui réduit la surface d’attaque XSS.</text:p>
      <text:p text:style-name="First_20_paragraph"><text:span text:style-name="T5">CSRF</text:span> : Cross-Site Request Forgery : attaque forçant un navigateur authentifié à envoyer une requête non voulue. Dans l’application, les formulaires de modification portent un jeton anti-CSRF.</text:p>
      <text:p text:style-name="Text_20_body"><text:span text:style-name="T5">DBA</text:span> : Database Administrator : administrateur de base de données, métier dédié à l’exploitation des serveurs de bases de données.</text:p>
      <text:p text:style-name="Text_20_body"><text:span text:style-name="T5">Docker</text:span> : technologie de conteneurs qui empaquette une application et ses dépendances afin de la déployer de façon reproductible.</text:p>
      <text:p text:style-name="Text_20_body"><text:span text:style-name="T5">Fernet</text:span> : schéma de chiffrement symétrique authentifié (AES-128-CBC + HMAC-SHA256), utilisé pour chiffrer les identifiants des sources en base.</text:p>
      <text:p text:style-name="Text_20_body"><text:span text:style-name="T5">Gunicorn</text:span> : serveur d’application Python utilisé en production pour exécuter l’application web derrière un serveur ou un proxy HTTP.</text:p>
      <text:p text:style-name="Text_20_body"><text:span text:style-name="T5">HDS</text:span> : Hébergeur de Données de Santé : certification française encadrant l’hébergement de données médicales.</text:p>
      <text:p text:style-name="Text_20_body"><text:span text:style-name="T5">LDAP</text:span> : Lightweight Directory Access Protocol : protocole d’accès à l’annuaire d’entreprise (comptes, groupes) ; utilisé ici pour déléguer l’authentification des utilisateurs.</text:p>
      <text:p text:style-name="Text_20_body"><text:span text:style-name="T5">Mode dégradé</text:span> : procédure ou document utilisé lorsque le fonctionnement normal d’un outil métier n’est plus disponible.</text:p>
      <text:p text:style-name="Text_20_body"><text:span text:style-name="T5">Nonce</text:span> : valeur aléatoire à usage unique ; ici, jeton généré à chaque réponse et exigé par la CSP pour autoriser un script à s’exécuter.</text:p>
      <text:p text:style-name="Text_20_body"><text:span text:style-name="T5">ORM</text:span> : Object-Relational Mapping : bibliothèque faisant correspondre les objets du code aux tables de la base de données (ici SQLAlchemy).</text:p>
      <text:p text:style-name="Text_20_body"><text:soft-page-break/><text:span text:style-name="T5">RBAC</text:span> : Role-Based Access Control : les droits sont attribués à des rôles, eux-mêmes assignés aux utilisateurs.</text:p>
      <text:p text:style-name="Text_20_body"><text:span text:style-name="T5">Recette</text:span> : phase de tests menée par le destinataire d’une application (ici la DSI) pour vérifier sa conformité avant mise en service.</text:p>
      <text:p text:style-name="Text_20_body"><text:span text:style-name="T5">SFTP</text:span> : SSH File Transfer Protocol : transfert de fichiers sécurisé via SSH, utilisé pour les sources Linux.</text:p>
      <text:p text:style-name="Text_20_body"><text:span text:style-name="T5">SMB/CIFS</text:span> : Server Message Block / Common Internet File System : protocole d’accès aux partages de fichiers Windows.</text:p>
      <text:p text:style-name="Text_20_body"><text:span text:style-name="T5">SMTP</text:span> : Simple Mail Transfer Protocol : protocole d’envoi des emails, utilisé pour les notifications de l’application.</text:p>
      <text:p text:style-name="Text_20_body"><text:span text:style-name="T5">SQLite WAL</text:span> : Write-Ahead Logging : mode d’écriture de SQLite améliorant les performances en lecture concurrente.</text:p>
      <text:p text:style-name="Text_20_body"><text:span text:style-name="T5">Token Bearer</text:span> : jeton secret transmis dans l’en-tête HTTP Authorization ; il authentifie les appels à l’API sans session de navigateur.</text:p>
      <text:p text:style-name="Text_20_body"><text:span text:style-name="T5">XSS</text:span> : Cross-Site Scripting : attaque consistant à injecter un script malveillant dans une page web consultée par d’autres utilisateurs.</text:p>
      <text:h text:style-name="Heading_20_1" text:outline-level="1"/>
      <text:h text:style-name="Heading_20_1" text:outline-level="1"><text:bookmark-start text:name="__RefHeading___Toc1145_2390793328"/><text:bookmark-start text:name="bibliographie-et-sitographie"/>Bibliographie et sitographie<text:bookmark-end text:name="__RefHeading___Toc1145_2390793328"/><text:bookmark-end text:name="bibliographie-et-sitographie"/></text:h>
      <text:h text:style-name="Heading_20_2" text:outline-level="2"><text:bookmark-start text:name="__RefHeading___Toc1147_2390793328"/><text:bookmark-start text:name="documentation-technique"/>Documentation technique<text:bookmark-end text:name="__RefHeading___Toc1147_2390793328"/><text:bookmark-end text:name="documentation-technique"/></text:h>
      <text:list text:style-name="L4">
        <text:list-item>
          <text:p text:style-name="P19">Jordan Borean et al., <text:span text:style-name="T6">smbprotocol Documentation</text:span>, dépôt GitHub du projet smbprotocol, (consulté le 12 juin 2026), disponible sur https://github.com/jborean93/smbprotocol</text:p>
        </text:list-item>
        <text:list-item>
          <text:p text:style-name="P19">Jeff Forcier et al., <text:span text:style-name="T6">Paramiko Documentation</text:span>, site officiel de Paramiko, (consulté le 12 juin 2026), disponible sur https://www.paramiko.org/</text:p>
        </text:list-item>
        <text:list-item>
          <text:p text:style-name="P19">Alex Grönholm, <text:span text:style-name="T6">APScheduler Documentation</text:span>, documentation en ligne d’APScheduler, (consulté le 12 juin 2026), disponible sur https://apscheduler.readthedocs.io/</text:p>
        </text:list-item>
        <text:list-item>
          <text:p text:style-name="P19"><text:soft-page-break/>Pallets, <text:span text:style-name="T6">Flask Documentation v3.x</text:span>, site officiel de Flask, (consulté le 12 juin 2026), disponible sur https://flask.palletsprojects.com/</text:p>
        </text:list-item>
        <text:list-item>
          <text:p text:style-name="P19">Python Cryptographic Authority, <text:span text:style-name="T6">cryptography : Fernet</text:span>, documentation en ligne de cryptography, (consulté le 12 juin 2026), disponible sur https://cryptography.io/en/latest/fernet/</text:p>
        </text:list-item>
        <text:list-item>
          <text:p text:style-name="P19">SQLAlchemy Authors, <text:span text:style-name="T6">SQLAlchemy 2.0 Documentation</text:span>, site officiel de SQLAlchemy, (consulté le 12 juin 2026), disponible sur https://docs.sqlalchemy.org/</text:p>
        </text:list-item>
      </text:list>
      <text:h text:style-name="Heading_20_2" text:outline-level="2"><text:bookmark-start text:name="__RefHeading___Toc1149_2390793328"/><text:bookmark-start text:name="sources-institutionnelles"/>Sources institutionnelles<text:bookmark-end text:name="__RefHeading___Toc1149_2390793328"/><text:bookmark-end text:name="sources-institutionnelles"/></text:h>
      <text:list text:style-name="L5">
        <text:list-item>
          <text:p text:style-name="P20">ANS (Agence du Numérique en Santé), <text:span text:style-name="T6">Certification HDS</text:span>, portail e-santé du ministère de la Santé, (consulté le 12 juin 2026), disponible sur https://esante.gouv.fr/labels-certifications/hds</text:p>
        </text:list-item>
        <text:list-item>
          <text:p text:style-name="P20">ANSSI, <text:span text:style-name="T6">Guide des bonnes pratiques de l’informatique</text:span>, site officiel de l’ANSSI, (consulté le 12 juin 2026), disponible sur https://www.ssi.gouv.fr/guide/bonnes-pratiques-de-linformatique/</text:p>
        </text:list-item>
        <text:list-item>
          <text:p text:style-name="P20">Centre Antoine Lacassagne, <text:span text:style-name="T6">Site institutionnel du Centre Antoine Lacassagne</text:span>, site officiel de l’établissement, (consulté le 12 juin 2026), disponible sur https://www.centreantoinelacassagne.org/</text:p>
        </text:list-item>
        <text:list-item>
          <text:p text:style-name="P20">Unicancer, <text:span text:style-name="T6">Fiche établissement Centre Antoine Lacassagne</text:span>, site officiel d’Unicancer, (consulté le 12 juin 2026), disponible sur https://www.unicancer.fr/fr/clcc/centre-antoine-lacassagn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paragraph-properties fo:keep-together="always"/>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fo:line-height="100%" fo:text-align="start" style:justify-single-word="false" fo:keep-together="always" fo:keep-with-next="alway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5.51cm" style:type="right" style:leader-style="dotted" style:leader-tex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011cm" style:type="right" style:leader-style="dotted" style:leader-text="."/>
        </style:tab-stops>
      </style:paragraph-properties>
    </style:style>
    <style:style style:name="Source_5f_Text" style:display-name="Source_Text"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age-count>30</text:page-count> </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dc:title>Développement d’une application web de centralisation et de suivi des PDF de modes dégradés</dc:title>
    <dc:description/>
    <dc:subject/>
    <meta:keyword/>
    <dc:language>fr-FR</dc:language>
    <meta:initial-creator>Maxime Giovanelli</meta:initial-creator>
    <meta:creation-date>2026-06-10T12:14:48Z</meta:creation-date>
    <dc:date>2026-06-12T14:36:26.879860600</dc:date>
    <meta:editing-duration>PT16M32S</meta:editing-duration>
    <meta:editing-cycles>8</meta:editing-cycles>
    <meta:document-statistic meta:table-count="0" meta:image-count="6" meta:object-count="0" meta:page-count="30" meta:paragraph-count="264" meta:word-count="7652" meta:character-count="51262" meta:non-whitespace-character-count="43825"/>
    <meta:user-defined meta:name="date">15 avril - 13 juin 2026</meta:user-defined>
    <meta:user-defined meta:name="subtitle">Rapport de stage - Bachelor Universitaire de Technologie Informatique - Année 2025-2026</meta:user-defined>
  </office:meta>
</office:document-meta>
</file>