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000000708B3A484D4.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60000000450CE76039B.png" manifest:media-type="image/png"/>
  <manifest:file-entry manifest:full-path="Pictures/10000000000006000000040047D08FDA.png" manifest:media-type="image/png"/>
  <manifest:file-entry manifest:full-path="Pictures/1000000000000B4000000708D0DE0DB3.png" manifest:media-type="image/png"/>
  <manifest:file-entry manifest:full-path="Pictures/1000000000000B4000000708DF728D40.png" manifest:media-type="image/png"/>
  <manifest:file-entry manifest:full-path="Pictures/1000000000000B4000000708D40118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paragraph-properties fo:break-before="page"/>
    </style:style>
    <style:style style:name="P13" style:family="paragraph" style:parent-style-name="Heading_20_1">
      <style:text-properties officeooo:paragraph-rsid="00207682"/>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Text_20_body">
      <style:paragraph-properties fo:line-height="115%"/>
    </style:style>
    <style:style style:name="P18" style:family="paragraph" style:parent-style-name="Text_20_body" style:list-style-name="L1">
      <style:paragraph-properties fo:margin-top="0cm" fo:margin-bottom="0cm" style:contextual-spacing="false" fo:line-height="115%"/>
    </style:style>
    <style:style style:name="P19" style:family="paragraph" style:parent-style-name="Text_20_body" style:list-style-name="L2">
      <style:paragraph-properties fo:margin-top="0cm" fo:margin-bottom="0cm" style:contextual-spacing="false" fo:line-height="115%"/>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6"><draw:image xlink:href="Pictures/100000010000015E0000015EF8BB9D41.png" xlink:type="simple" xlink:show="embed" xlink:actuate="onLoad" draw:mime-type="image/png"/></draw:frame><text:span text:style-name="T1">E</text:span></text:p>
      <text:p text:style-name="P2"><text:s/>41 BD. NAPOLEON III - 06200 NICE</text:p>
      <text:p text:style-name="P2"/>
      <text:p text:style-name="P3"><text:bookmark-start text:name="__RefHeading___Toc1270_103736273"/>Développement d’une application web de centralisation et de suivi des PDF de modes dégradés<text:bookmark-end text:name="__RefHeading___Toc1270_103736273"/></text:p>
      <text:p text:style-name="P4">Réalisé par <text:span text:style-name="T2">Maxime Giovanelli</text:span></text:p>
      <text:p text:style-name="P5"/>
      <text:p text:style-name="P6"><draw:frame draw:style-name="fr1" draw:name="Image1" text:anchor-type="char" svg:x="3.81cm" svg:y="-0.023cm" svg:width="9.527cm" svg:height="5.431cm" draw:z-index="5"><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P12" text:outline-level="1" text:is-list-header="true"><text:bookmark-start text:name="remerciements"/><text:bookmark-start text:name="__RefHeading___Toc1079_2390793328"/>Remerciements<text:bookmark-end text:name="remerciements"/><text:bookmark-end text:name="__RefHeading___Toc1079_2390793328"/></text:h>
      <text:p text:style-name="First_20_paragraph">Je remercie Julien Degardin, responsable au sein de la DSI du Centre Antoine Lacassagne, pour son encadrement pendant ces huit semaines : ses retours techniques et sa formulation claire du besoin métier ont permis de garder un périmètre réaliste.</text:p>
      <text:p text:style-name="Text_20_body">Je remercie également Olivier Pantz, tuteur pédagogique à l’IUT Nice Côte d’Azur, pour le suivi du stage, ainsi que l’ensemble de l’équipe de la DSI pour son accueil et ses explications sur le fonctionnement informatique de l’établissement.</text:p>
      <text:h text:style-name="Heading_20_1" text:outline-level="1"><text:bookmark-start text:name="résumé"/><text:bookmark-start text:name="__RefHeading___Toc1081_2390793328"/>Résumé<text:bookmark-end text:name="résumé"/><text:bookmark-end text:name="__RefHeading___Toc1081_2390793328"/></text:h>
      <text:p text:style-name="First_20_paragraph">Ce rapport présente un stage de huit semaines réalisé au Centre Antoine Lacassagne, centre de lutte contre le cancer situé à Nice, au sein de la Direction des Systèmes d’Information (DSI).</text:p>
      <text:p text:style-name="Text_20_body">Quand un outil métier devient indisponible, les équipes soignantes et administratives doivent retrouver rapidement les documents PDF de modes dégradés (formulaires, procédures, fiches réflexes). Ces documents étaient répartis sur des stockages hétérogènes (SFTP, SMB/CIFS, dossier local), sans vue centralisée ni contrôle de fraîcheur pour la DSI.</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text:p>
      <text:p text:style-name="Text_20_body">L’application livrée, Arche (Flask, SQLAlchemy, SQLite, APScheduler, Docker), collecte les PDF depuis trois types de sources, calcule leur fraîcheur, offre une interface web avec viewer PDF, une purge progressive avec corbeille et une API REST. Les opérations sont journalisées ; la sécurité couvre sessions, tokens, CSRF, CSP, chiffrement Fernet et confinement des chemins - exigences issues du contexte HDS.</text:p>
      <text:p text:style-name="Text_20_body">Le livrable est une base applicative documentée, testée et conteneurisable. Il reste à la valider sur l’infrastructure réelle de la DSI.</text:p>
      <text:h text:style-name="P13" text:outline-level="1"><text:bookmark-start text:name="__RefHeading___Toc1363_2524517924"/><text:bookmark-start text:name="summary"/><text:soft-page-break/>Summary<text:bookmark-end text:name="__RefHeading___Toc1363_2524517924"/><text:bookmark-end text:name="summary"/></text:h>
      <text:p text:style-name="First_20_paragraph">This report presents an eight-week internship at Centre Antoine Lacassagne, a cancer treatment center in Nice, within its IT department (DSI).</text:p>
      <text:p text:style-name="Text_20_body">When standard tools become unavailable, medical and administrative staff need quick access to degraded-mode PDF documents (forms, procedures, reference sheets).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Flask, SQLAlchemy, SQLite, APScheduler, Docker), collects PDFs from three source types, computes freshness statuses, provides a web interface with an integrated PDF viewer, progressive purge with a trash bin, and a REST API. Operations are logged; security covers sessions, tokens, CSRF, CSP, Fernet encryption and path confinement.</text:p>
      <text:p text:style-name="Text_20_body">The result is a documented, tested and containerizable application base. The DSI still has to validate it on real infrastructure before production us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4"><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2</text:a></text:p>
          <text:p text:style-name="P14"><text:a xlink:type="simple" xlink:href="#__RefHeading___Toc1081_2390793328" text:style-name="Index_20_Link" text:visited-style-name="Index_20_Link">Résumé<text:tab/>2</text:a></text:p>
          <text:p text:style-name="P14"><text:a xlink:type="simple" xlink:href="#__RefHeading___Toc1363_2524517924" text:style-name="Index_20_Link" text:visited-style-name="Index_20_Link">Summary<text:tab/>3</text:a></text:p>
          <text:p text:style-name="P14"><text:a xlink:type="simple" xlink:href="#__RefHeading___Toc1087_2390793328" text:style-name="Index_20_Link" text:visited-style-name="Index_20_Link">1. Introduction<text:tab/>4</text:a></text:p>
          <text:p text:style-name="P14"><text:a xlink:type="simple" xlink:href="#__RefHeading___Toc1089_2390793328" text:style-name="Index_20_Link" text:visited-style-name="Index_20_Link">2. Analyse de la situation<text:tab/>6</text:a></text:p>
          <text:p text:style-name="P15"><text:a xlink:type="simple" xlink:href="#__RefHeading___Toc1091_2390793328" text:style-name="Index_20_Link" text:visited-style-name="Index_20_Link">2.1 Présentation du Centre Antoine Lacassagne<text:tab/>6</text:a></text:p>
          <text:p text:style-name="P15"><text:a xlink:type="simple" xlink:href="#__RefHeading___Toc1093_2390793328" text:style-name="Index_20_Link" text:visited-style-name="Index_20_Link">2.2 Service DSI et contraintes HDS<text:tab/>6</text:a></text:p>
          <text:p text:style-name="P15"><text:a xlink:type="simple" xlink:href="#__RefHeading___Toc1095_2390793328" text:style-name="Index_20_Link" text:visited-style-name="Index_20_Link">2.3 Analyse des besoins<text:tab/>7</text:a></text:p>
          <text:p text:style-name="P15"><text:a xlink:type="simple" xlink:href="#__RefHeading___Toc1097_2390793328" text:style-name="Index_20_Link" text:visited-style-name="Index_20_Link">2.4 Cahier des charges et planning<text:tab/>8</text:a></text:p>
          <text:p text:style-name="P14"><text:a xlink:type="simple" xlink:href="#__RefHeading___Toc1099_2390793328" text:style-name="Index_20_Link" text:visited-style-name="Index_20_Link"><text:soft-page-break/>3. Conception et réalisation<text:tab/>8</text:a></text:p>
          <text:p text:style-name="P15"><text:a xlink:type="simple" xlink:href="#__RefHeading___Toc1101_2390793328" text:style-name="Index_20_Link" text:visited-style-name="Index_20_Link">3.1 Choix technologiques et argumentation<text:tab/>8</text:a></text:p>
          <text:p text:style-name="P16"><text:a xlink:type="simple" xlink:href="#__RefHeading___Toc1103_2390793328" text:style-name="Index_20_Link" text:visited-style-name="Index_20_Link">Backend : Flask<text:tab/>8</text:a></text:p>
          <text:p text:style-name="P16"><text:a xlink:type="simple" xlink:href="#__RefHeading___Toc1105_2390793328" text:style-name="Index_20_Link" text:visited-style-name="Index_20_Link">Base de données : SQLite via SQLAlchemy<text:tab/>9</text:a></text:p>
          <text:p text:style-name="P16"><text:a xlink:type="simple" xlink:href="#__RefHeading___Toc1107_2390793328" text:style-name="Index_20_Link" text:visited-style-name="Index_20_Link">File de jobs : ThreadPoolExecutor<text:tab/>9</text:a></text:p>
          <text:p text:style-name="P16"><text:a xlink:type="simple" xlink:href="#__RefHeading___Toc1109_2390793328" text:style-name="Index_20_Link" text:visited-style-name="Index_20_Link">Chiffrement des identifiants : Fernet<text:tab/>9</text:a></text:p>
          <text:p text:style-name="P15"><text:a xlink:type="simple" xlink:href="#__RefHeading___Toc1111_2390793328" text:style-name="Index_20_Link" text:visited-style-name="Index_20_Link">3.2 Architecture applicative<text:tab/>9</text:a></text:p>
          <text:p text:style-name="P16"><text:a xlink:type="simple" xlink:href="#__RefHeading___Toc1113_2390793328" text:style-name="Index_20_Link" text:visited-style-name="Index_20_Link">Les jobs planifiés : trois leçons sur la concurrence<text:tab/>10</text:a></text:p>
          <text:p text:style-name="P15"><text:a xlink:type="simple" xlink:href="#__RefHeading___Toc1115_2390793328" text:style-name="Index_20_Link" text:visited-style-name="Index_20_Link">3.3 Sources et synchronisation<text:tab/>11</text:a></text:p>
          <text:p text:style-name="P15"><text:a xlink:type="simple" xlink:href="#__RefHeading___Toc1117_2390793328" text:style-name="Index_20_Link" text:visited-style-name="Index_20_Link">3.4 Fraîcheur, purge et corbeille<text:tab/>14</text:a></text:p>
          <text:p text:style-name="P15"><text:a xlink:type="simple" xlink:href="#__RefHeading___Toc1119_2390793328" text:style-name="Index_20_Link" text:visited-style-name="Index_20_Link">3.5 Interface web et parcours utilisateur<text:tab/>15</text:a></text:p>
          <text:p text:style-name="P15"><text:a xlink:type="simple" xlink:href="#__RefHeading___Toc1121_2390793328" text:style-name="Index_20_Link" text:visited-style-name="Index_20_Link">3.6 API REST<text:tab/>17</text:a></text:p>
          <text:p text:style-name="P15"><text:a xlink:type="simple" xlink:href="#__RefHeading___Toc1123_2390793328" text:style-name="Index_20_Link" text:visited-style-name="Index_20_Link">3.7 Sécurité<text:tab/>17</text:a></text:p>
          <text:p text:style-name="P15"><text:a xlink:type="simple" xlink:href="#__RefHeading___Toc1125_2390793328" text:style-name="Index_20_Link" text:visited-style-name="Index_20_Link">3.8 Tests et qualité<text:tab/>18</text:a></text:p>
          <text:p text:style-name="P15"><text:a xlink:type="simple" xlink:href="#__RefHeading___Toc1127_2390793328" text:style-name="Index_20_Link" text:visited-style-name="Index_20_Link">3.9 Déploiement et exploitation<text:tab/>19</text:a></text:p>
          <text:p text:style-name="P14"><text:a xlink:type="simple" xlink:href="#__RefHeading___Toc1129_2390793328" text:style-name="Index_20_Link" text:visited-style-name="Index_20_Link">4. Bilan et perspectives<text:tab/>20</text:a></text:p>
          <text:p text:style-name="P15"><text:a xlink:type="simple" xlink:href="#__RefHeading___Toc1131_2390793328" text:style-name="Index_20_Link" text:visited-style-name="Index_20_Link">4.1 Résultats obtenus<text:tab/>20</text:a></text:p>
          <text:p text:style-name="P15"><text:a xlink:type="simple" xlink:href="#__RefHeading___Toc1133_2390793328" text:style-name="Index_20_Link" text:visited-style-name="Index_20_Link">4.2 Perspectives et évolutions<text:tab/>20</text:a></text:p>
          <text:p text:style-name="P15"><text:a xlink:type="simple" xlink:href="#__RefHeading___Toc1135_2390793328" text:style-name="Index_20_Link" text:visited-style-name="Index_20_Link">4.3 Accompagnement du CSU lors des interventions<text:tab/>20</text:a></text:p>
          <text:p text:style-name="P14"><text:a xlink:type="simple" xlink:href="#__RefHeading___Toc1141_2390793328" text:style-name="Index_20_Link" text:visited-style-name="Index_20_Link">5. Difficultés rencontrées<text:tab/>21</text:a></text:p>
          <text:p text:style-name="P14"><text:a xlink:type="simple" xlink:href="#__RefHeading___Toc1143_2390793328" text:style-name="Index_20_Link" text:visited-style-name="Index_20_Link">6. Conclusion<text:tab/>22</text:a></text:p>
          <text:p text:style-name="P14"><text:a xlink:type="simple" xlink:href="#__RefHeading___Toc1157_2390793328" text:style-name="Index_20_Link" text:visited-style-name="Index_20_Link">Table des illustrations<text:tab/>23</text:a></text:p>
          <text:p text:style-name="P14"><text:a xlink:type="simple" xlink:href="#__RefHeading___Toc1085_2390793328" text:style-name="Index_20_Link" text:visited-style-name="Index_20_Link">Glossaire<text:tab/>23</text:a></text:p>
          <text:p text:style-name="P14"><text:a xlink:type="simple" xlink:href="#__RefHeading___Toc1145_2390793328" text:style-name="Index_20_Link" text:visited-style-name="Index_20_Link">Bibliographie et sitographie<text:tab/>24</text:a></text:p>
          <text:p text:style-name="P15"><text:a xlink:type="simple" xlink:href="#__RefHeading___Toc1147_2390793328" text:style-name="Index_20_Link" text:visited-style-name="Index_20_Link">Documentation technique<text:tab/>24</text:a></text:p>
          <text:p text:style-name="P15"><text:a xlink:type="simple" xlink:href="#__RefHeading___Toc1149_2390793328" text:style-name="Index_20_Link" text:visited-style-name="Index_20_Link">Sources institutionnelles<text:tab/>25</text:a></text:p>
        </text:index-body>
      </text:table-of-content>
      <text:h text:style-name="Heading_20_1" text:outline-level="1"><text:bookmark-start text:name="introduction"/><text:bookmark-start text:name="__RefHeading___Toc1087_2390793328"/>1. Introduction<text:bookmark-end text:name="introduction"/><text:bookmark-end text:name="__RefHeading___Toc1087_2390793328"/></text:h>
      <text:p text:style-name="First_20_paragraph">Lorsqu’un outil informatique du Centre Antoine Lacassagne devient indisponible (panne réseau, mise à jour bloquante, incident serveur), le personnel doit continuer à travailler : les <text:span text:style-name="T5">modes dégradés</text:span> répondent à ce besoin par des procédures et formulaires papier ou PDF qui remplacent temporairement les outils habituels.</text:p>
      <text:p text:style-name="Text_20_body">Ces documents existent dans l’établissement, mais leur gestion reste dispersée : un serveur SFTP pour le bloc opératoire, un partage SMB pour les urgences, un dossier local ailleurs. Aucune vue centralisée ne répondait aux questions simples : « ce document est-il à jour ? », « existe-t-il encore sur le serveur source ? », « quand a-t-il été modifié ? ».</text:p>
      <text:p text:style-name="Text_20_body"><text:soft-page-break/>La DSI m’a confié la conception et le développement d’une application web interne pour combler ce vide, avec quatre contraintes simultanées : fédérer des protocoles hétérogènes en un point d’accès unique ; calculer la fraîcheur documentaire sans saturer le réseau ; protéger les identifiants des serveurs en gardant une administration simple ; déployer sans composant lourd.</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width="10.881cm" style:rel-width="68%" svg:height="7.819cm" style:rel-height="scale" draw:z-index="0"><draw:image xlink:href="Pictures/100000000000060000000450CE76039B.png" xlink:type="simple" xlink:show="embed" xlink:actuate="onLoad" draw:mime-type="image/png"/></draw:frame></text:p>
      <text:p text:style-name="FigureCaption">Figure 1 : Situation avant et après Arche : dispersion des sources et accès centralisé.</text:p>
      <text:p text:style-name="Text_20_body">Le rapport suit un plan problème/solution en trois parties. La première analyse la situation : l’établissement, la DSI, les contraintes HDS et les besoins. La deuxième retrace la conception <text:soft-page-break/>dans l’ordre où les problèmes se sont réellement posés : pour chaque sous-système, la difficulté rencontrée, les solutions envisagées et celle que j’ai retenue - y compris mes premières versions imparfaites, souvent les plus instructives. La troisième dresse le bilan et revient sur la seconde mission du stage, l’accompagnement du support aux utilisateurs ; une dernière section rassemble les difficultés transversales, avant que la conclusion ne réponde à la problématique.</text:p>
      <text:h text:style-name="Heading_20_1" text:outline-level="1"><text:bookmark-start text:name="partie-i-analyse-de-la-situation"/><text:bookmark-start text:name="__RefHeading___Toc1089_2390793328"/>2. Analyse de la situation<text:bookmark-end text:name="partie-i-analyse-de-la-situation"/><text:bookmark-end text:name="__RefHeading___Toc1089_2390793328"/></text:h>
      <text:h text:style-name="Heading_20_2" text:outline-level="2"><text:bookmark-start text:name="i.1-présentation-du-centre-antoine-lacassagne"/><text:bookmark-start text:name="__RefHeading___Toc1091_2390793328"/>2.1 Présentation du Centre Antoine Lacassagne<text:bookmark-end text:name="i.1-présentation-du-centre-antoine-lacassagne"/><text:bookmark-end text:name="__RefHeading___Toc1091_2390793328"/></text:h>
      <text:p text:style-name="First_20_paragraph">Le Centre Antoine Lacassagne (CAL) est un Centre de Lutte Contre le Cancer (CLCC) niçois, membre du réseau Unicancer ; il accueille chaque année plus de 15 000 patients, emploie environ 800 personnes et couvre les trois missions des CLCC : soins (oncologie, radiothérapie, chirurgie), recherche clinique et formation.</text:p>
      <text:p text:style-name="Text_20_body">Son système d’information porte des données de santé au sens de la réglementation française - dossiers patients, prescriptions, imagerie médicale - ce qui impose des exigences fortes de sécurité, de traçabilité et de confidentialité. La DSI gère l’infrastructure, les serveurs, les applications métier et la sécurité des systèmes dans ce cadre contraint.</text:p>
      <text:h text:style-name="Heading_20_2" text:outline-level="2"><text:bookmark-start text:name="i.2-service-dsi-et-contraintes-hds"/><text:bookmark-start text:name="__RefHeading___Toc1093_2390793328"/>2.2 Service DSI et contraintes HDS<text:bookmark-end text:name="i.2-service-dsi-et-contraintes-hds"/><text:bookmark-end text:name="__RefHeading___Toc1093_2390793328"/></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 documenter les mesures de sécurité, tracer les accès, formaliser sauvegardes et gestion d’incidents. Elle vise l’hébergement, mais toute application interne doit s’aligner sur les mêmes exigences ; pour Arche, cela s’est traduit par le chiffrement des identifiants, les journaux d’opérations, le contrôle d’accès par rôle et la gestion séparée des secrets.</text:p>
      <text:p text:style-name="Text_20_body"><text:soft-page-break/><text:span text:style-name="T5">Continuité d’activité</text:span> : un établissement de santé doit continuer à fonctionner pendant une panne informatique ; les procédures de mode dégradé (panne du dossier patient, du système de prescription, coupure réseau) reposent sur des documents PDF qui doivent rester accessibles même quand l’outil principal ne l’est plus.</text:p>
      <text:p text:style-name="Text_20_body"><text:span text:style-name="T5">Contraintes de déploiement</text:span> : la DSI ne souhaitait pas d’infrastructure complexe pour une application interne : SQLite acceptable, pas de serveur de base de données externe, déploiement par conteneur Docker, configuration par variables d’environnement.</text:p>
      <text:h text:style-name="Heading_20_2" text:outline-level="2"><text:bookmark-start text:name="i.3-analyse-des-besoins"/><text:bookmark-start text:name="__RefHeading___Toc1095_2390793328"/>2.3 Analyse des besoins<text:bookmark-end text:name="i.3-analyse-des-besoins"/><text:bookmark-end text:name="__RefHeading___Toc1095_2390793328"/></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p text:style-name="Text_20_body">Déclarer des sources (SFTP, SMB, local) et tester leur connexion ; synchroniser automatiquement les PDF en conservant une copie locale ; suivre la fraîcheur de chaque document (date de modification source, statut) ; permettre consultation, recherche, filtrage et téléchargement depuis une interface web ; journaliser toutes les opérations.</text:p>
      <text:p text:style-name="First_20_paragraph"><text:span text:style-name="T5">Besoins fonctionnels secondaires</text:span> - la qualité d’exploitation, qui conditionne l’adoption par la DSI :</text:p>
      <text:p text:style-name="Text_20_body">Gestion des utilisateurs, des rôles et des permissions (RBAC) ; API REST pour les intégrations futures ; purge automatique avec passage par une corbeille ; notifications email en cas d’erreur ou de document critique.</text:p>
      <text:p text:style-name="First_20_paragraph"><text:span text:style-name="T5">Contraintes non fonctionnelles</text:span> - les conditions sine qua non d’un déploiement hospitalier :</text:p>
      <text:p text:style-name="Text_20_body">Sécurité (chiffrement des identifiants, sessions, en-têtes HTTP, contrôle des chemins) ; déployabilité (Docker + Gunicorn, configuration par variables d’environnement, SQLite) ; maintenabilité (code en couches, tests automatisés, documentation d’exploitation).</text:p>
      <text:h text:style-name="Heading_20_2" text:outline-level="2"><text:bookmark-start text:name="i.4-cahier-des-charges-et-matrice-des-exigences"/><text:bookmark-start text:name="__RefHeading___Toc1097_2390793328"/><text:soft-page-break/>2.4 Cahier des charges et planning<text:bookmark-end text:name="i.4-cahier-des-charges-et-matrice-des-exigences"/><text:bookmark-end text:name="__RefHeading___Toc1097_2390793328"/></text:h>
      <text:p text:style-name="First_20_paragraph">Le cahier des charges de la DSI détaille les exigences : sources et connecteurs, synchronisation et déduplication, suivi de fraîcheur, consultation web, sécurité, API, exploitation ; leur état de livraison est dressé e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réalisé a suivi ce prévisionnel, à un débordement près : la sécurité, dont la charge croît avec chaque fonctionnalité manipulant fichiers et identifiants. Le décalage a été absorbé en jouant sur le périmètre plutôt que sur la qualité : certaines fonctionnalités avancées ont été documentées plutôt que finalisées.</text:p>
      <text:h text:style-name="Heading_20_1" text:outline-level="1"><text:bookmark-start text:name="partie-ii-conception-et-réalisation"/><text:bookmark-start text:name="__RefHeading___Toc1099_2390793328"/>3. Conception et réalisation<text:bookmark-end text:name="partie-ii-conception-et-réalisation"/><text:bookmark-end text:name="__RefHeading___Toc1099_2390793328"/></text:h>
      <text:h text:style-name="Heading_20_2" text:outline-level="2"><text:bookmark-start text:name="ii.1-choix-technologiques-et-argumentation"/><text:bookmark-start text:name="__RefHeading___Toc1101_2390793328"/>3.1 Choix technologiques et argumentation<text:bookmark-end text:name="ii.1-choix-technologiques-et-argumentation"/><text:bookmark-end text:name="__RefHeading___Toc1101_2390793328"/></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backend-flask"/><text:bookmark-start text:name="__RefHeading___Toc1103_2390793328"/>Backend : Flask<text:bookmark-end text:name="backend-flask"/><text:bookmark-end text:name="__RefHeading___Toc1103_2390793328"/></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base-de-données-sqlite-via-sqlalchemy"/><text:bookmark-start text:name="__RefHeading___Toc1105_2390793328"/><text:soft-page-break/>Base de données : SQLite via SQLAlchemy<text:bookmark-end text:name="base-de-données-sqlite-via-sqlalchemy"/><text:bookmark-end text:name="__RefHeading___Toc1105_2390793328"/></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si ce volume devait croître, SQLAlchemy laisse ouverte la migration vers PostgreSQL sans réécrire la couche de données.</text:p>
      <text:h text:style-name="Heading_20_3" text:outline-level="3"><text:bookmark-start text:name="file-de-jobs-threadpoolexecutor"/><text:bookmark-start text:name="__RefHeading___Toc1107_2390793328"/>File de jobs : ThreadPoolExecutor<text:bookmark-end text:name="file-de-jobs-threadpoolexecutor"/><text:bookmark-end text:name="__RefHeading___Toc1107_2390793328"/></text:h>
      <text:p text:style-name="First_20_paragraph">Un <text:span text:style-name="Source_5f_Text">ThreadPoolExecutor</text:span> interne suffit pour quelques dizaines de synchronisations par jour - sans dépendance supplémentair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chiffrement-des-identifiants-fernet"/><text:bookmark-start text:name="__RefHeading___Toc1109_2390793328"/>Chiffrement des identifiants : Fernet<text:bookmark-end text:name="chiffrement-des-identifiants-fernet"/><text:bookmark-end text:name="__RefHeading___Toc1109_2390793328"/></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leurs identifiants doivent être stockés en base ; les chiffrer avec une clé conservée hors de la base garantit qu’une copie du fichier SQLite seule ne divulgue aucun identifiant.</text:p>
      <text:h text:style-name="Heading_20_2" text:outline-level="2"><text:bookmark-start text:name="ii.2-architecture-applicative"/><text:bookmark-start text:name="__RefHeading___Toc1111_2390793328"/>3.2 Architecture applicative<text:bookmark-end text:name="ii.2-architecture-applicative"/><text:bookmark-end text:name="__RefHeading___Toc1111_2390793328"/></text:h>
      <text:p text:style-name="First_20_paragraph">Arche est un monolithe Flask - une seule application déployée d’un bloc - organisé en couches distinctes. Ce découpage en couches n’est pas anodin : au départ, les premières routes mélangeaient logique d’accès réseau, règles de stockage et rendu HTML - ce qui rendait les tests impossibles et les bugs difficiles à isoler. Séparer les couches a été la première décision structurelle du projet.</text:p>
      <text:p text:style-name="Text_20_body"><text:soft-page-break/>La figure 2 positionne Arche entre les sources hétérogènes, les utilisateurs web et les clients API.</text:p>
      <text:p text:style-name="FigureWithCaption"><draw:frame draw:style-name="fr2" draw:name="img2" text:anchor-type="as-char" svg:width="10.881cm" style:rel-width="68%" svg:height="7.251cm" style:rel-height="scale" draw:z-index="7"><draw:image xlink:href="Pictures/100000000000060000000400365D767B.png" xlink:type="simple" xlink:show="embed" xlink:actuate="onLoad" draw:mime-type="image/png"/></draw:frame></text:p>
      <text:p text:style-name="FigureCaption">Figure 2 :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les-jobs-planifiés-trois-leçons-sur-la-concurrence"/><text:bookmark-start text:name="__RefHeading___Toc1113_2390793328"/>Les jobs planifiés : trois leçons sur la concurrence<text:bookmark-end text:name="les-jobs-planifiés-trois-leçons-sur-la-concurrence"/><text:bookmark-end text:name="__RefHeading___Toc1113_2390793328"/></text:h>
      <text:p text:style-name="First_20_paragraph">Cette architecture a été mise à l’épreuve par les jobs planifiés. APScheduler exécute chaque tâche périodique - synchronisation par source, purge à 2 h et nettoyage de la corbeille à 3 h (deux mécanismes détaillés en section 3.4), rapport de conformité à 8 h (un état quotidien de la fraîcheur du parc documentaire) - dans un thread séparé du processus Flask. Cette cohabitation entre threads de fond et requêtes web m’a confronté à trois problèmes successifs.</text:p>
      <text:p text:style-name="Text_20_body"><text:soft-page-break/>Le premier est apparu dès le premier essai : <text:span text:style-name="Source_5f_Text">RuntimeError: Working outside of application context</text:span>. Le même code fonctionnait depuis une route web et plantait appelé par le scheduler :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text:p>
      <text:p text:style-name="Text_20_body">Le deuxième problème était un chevauchement : avec une fréquence de test courte et une source lente, le job suivant démarrait avant la fin du précédent - deux threads écrivaient sur les mêmes lignes en base. APScheduler fournit exactement les garde-fous nécessaires : <text:span text:style-name="Source_5f_Text">max_instances=1</text:span> interdit deux exécutions simultanées du même job, et <text:span text:style-name="Source_5f_Text">misfire_grace_time=60</text:span> autorise un déclenchement en retard plutôt qu’une exécution de rattrapage en rafale. Une garde au démarrage évite enfin le double scheduler créé par le rechargeur automatique de Flask en développement.</text:p>
      <text:p text:style-name="Text_20_body">Le troisième touchait SQLite : synchronisation planifiée active et 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exactement notre profil d’usage : écritures occasionnelles, lectures fréquentes.</text:p>
      <text:p text:style-name="Text_20_body">Ces fondations posées - couches séparées, jobs maîtrisés, base fiabilisée -, le cœur fonctionnel restait à construire : la collecte des documents elle-même.</text:p>
      <text:h text:style-name="Heading_20_2" text:outline-level="2"><text:bookmark-start text:name="ii.3-sources-et-synchronisation"/><text:bookmark-start text:name="__RefHeading___Toc1115_2390793328"/>3.3 Sources et synchronisation<text:bookmark-end text:name="ii.3-sources-et-synchronisation"/><text:bookmark-end text:name="__RefHeading___Toc1115_2390793328"/></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text:soft-page-break/>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téléchargeait chaque fichier distant, calculait son hash SHA-256 et ne remplaçait la copie locale qu’en cas de changement. Fonctionnellement correct ; mais chaque synchronisation re-téléchargeait l’intégralité de la source, car il faut posséder un fichier pour le hacher. Face à l’objectif du cahier des charges (500 PDF en moins de 5 minutes), cette approche ne tenait pas.</text:p>
      <text:p text:style-name="Text_20_body"><text:span text:style-name="T5">Deuxième version : déduplication à deux niveaux.</text:span> La solution exploite les métadonnées que SFTP et SMB fournissent gratuitement à l’inventaire - taille et date de modification : si les deux correspondent à la base, le fichier est ignoré d’emblée. Le hash ne sert plus qu’en confirmation après téléchargement, contre les fichiers re-datés sans modification. Le coût réseau devient proportionnel à ce qui a <text:span text:style-name="T6">changé</text:span>, et non à la taille totale de la source.</text:p>
      <text:p text:style-name="Text_20_body"><text:span text:style-name="T5">Le bug des deux secondes.</text:span> Ce pré-filtre a fait apparaître un bug déroutant : certains fichiers - toujours les mêmes - étaient re-téléchargés sans avoir changé. En journalisant les comparaisons, j’ai constaté des écarts d’une seconde : plusieurs systèmes de fichiers et serveurs SMB arrondissent les dates de modification à deux secondes près, et l’arrondi peut différer entre le serveur et la base.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Le connecteur SFTP a ensuite levé une erreur nouvelle pour moi : <text:span text:style-name="Source_5f_Text">TypeError: can't subtract offset-naive and offset-aware datetimes</text:span>. Paramiko renvoie des dates « naïves » (sans fuseau), l’application travaille en UTC « aware » ; Python refuse de les soustraire, à raison. Règle adoptée pour tout le projet : tout est stocké et comparé en UTC, la conversion locale n’intervient qu’à l’affichage ; un petit utilitaire normalise les dates entrantes :</text:p>
      <text:p text:style-name="Preformatted_20_Text"><text:soft-page-break/>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renommé seulement une fois complet et supprimé en cas d’exception : sans cela, une coupure réseau laisserait un PDF tronqué servi tel quel à l’utilisateur - une défaillance silencieuse interdite pour un outil de continuité d’activité. Le calcul du hash lit par blocs de 64 Ko : certains PDF sont des scans de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2" draw:name="img3" text:anchor-type="as-char" svg:width="10.881cm" style:rel-width="68%" svg:height="3.014cm" style:rel-height="scale" draw:z-index="8"><draw:image xlink:href="Pictures/1000000000000C540000036BDC3B4453.png" xlink:type="simple" xlink:show="embed" xlink:actuate="onLoad" draw:mime-type="image/png"/></draw:frame></text:p>
      <text:p text:style-name="FigureCaption">Figure 3 : Flux de synchronisation d’un document PDF : déduplication à deux niveaux et écriture contrôlée.</text:p>
      <text:p text:style-name="Text_20_body"><text:span text:style-name="T5">Les noms de fichiers, une entrée comme une autre.</text:span> Le point le plus sensible concerne les noms de fichiers distants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text:p>
      <text:p text:style-name="Text_20_body">La synchronisation répond à la question « comment collecter efficacement ». Restait la question symétrique, tout aussi importante pour la DSI : que deviennent les documents qui vieillissent ?</text:p>
      <text:h text:style-name="Heading_20_2" text:outline-level="2"><text:bookmark-start text:name="ii.4-fraîcheur-purge-et-corbeille"/><text:bookmark-start text:name="__RefHeading___Toc1117_2390793328"/><text:soft-page-break/>3.4 Fraîcheur, purge et corbeille<text:bookmark-end text:name="ii.4-fraîcheur-purge-et-corbeille"/><text:bookmark-end text:name="__RefHeading___Toc1117_2390793328"/></text:h>
      <text:p text:style-name="First_20_paragraph">Chaque document porte un statut calculé depuis son âge et les seuils de sa sourc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gradation laisse le temps de réagir, et les seuils par source permettent des politiques adaptées à la criticité des procédures. La purge répond à un risque métier réel :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draw:frame draw:style-name="fr2" draw:name="img4" text:anchor-type="as-char" svg:width="10.881cm" style:rel-width="68%" svg:height="7.251cm" style:rel-height="scale" draw:z-index="9"><draw:image xlink:href="Pictures/10000000000006000000040047D08FDA.png" xlink:type="simple" xlink:show="embed" xlink:actuate="onLoad" draw:mime-type="image/png"/></draw:frame></text:p>
      <text:p text:style-name="FigureCaption">Figure 4 : Cycle de vie d’un document PDF : états de fraîcheur, transitions et chronologie de purge.</text:p>
      <text:p text:style-name="Text_20_body">Ces mécanismes tournent en arrière-plan ; pour l’utilisateur, ils se résument à un badge de couleur sur chaque document. C’est l’interface web qui rend ce travail visible.</text:p>
      <text:h text:style-name="Heading_20_2" text:outline-level="2"><text:bookmark-start text:name="ii.5-interface-web-et-parcours-utilisateur"/><text:bookmark-start text:name="__RefHeading___Toc1119_2390793328"/><text:soft-page-break/>3.5 Interface web et parcours utilisateur<text:bookmark-end text:name="ii.5-interface-web-et-parcours-utilisateur"/><text:bookmark-end text:name="__RefHeading___Toc1119_2390793328"/></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les journaux et l’administration. Les figures 5 à 8 montrent ces écrans tels qu’ils se présentent en exploitation.</text:p>
      <text:p text:style-name="Text_20_body">Le tableau de bord synthétise l’état du parc : volume de documents suivis, part à jour, documents en avertissement ou critiques, état de chaque source et derniers documents à traiter (figure 5).</text:p>
      <text:p text:style-name="FigureWithCaption"><draw:frame draw:style-name="fr3" draw:name="imgArche1" text:anchor-type="as-char" svg:width="10.4cm" svg:height="6.5cm" style:rel-height="scale" draw:z-index="1"><draw:image xlink:href="Pictures/1000000000000B4000000708D0DE0DB3.png" xlink:type="simple" xlink:show="embed" xlink:actuate="onLoad" draw:mime-type="image/png"/></draw:frame></text:p>
      <text:p text:style-name="FigureCaption">Figure 5 : Tableau de bord d’Arche : état du parc documentaire et des sources.</text:p>
      <text:p text:style-name="Text_20_body">La consultation s’appuie sur la recherche et les filtres (source, statut, période) ; un badge de couleur matérialise la fraîcheur de chaque document (figure 6). Le viewer intégré affiche le PDF sans téléchargement, accompagné de ses métadonnées de collecte : source, hash SHA-256, dates et statut (figure 7).</text:p>
      <text:p text:style-name="FigureWithCaption"><text:soft-page-break/><draw:frame draw:style-name="fr3" draw:name="imgArche2" text:anchor-type="as-char" svg:width="10.4cm" svg:height="6.5cm" style:rel-height="scale" draw:z-index="2"><draw:image xlink:href="Pictures/1000000000000B4000000708B3A484D4.png" xlink:type="simple" xlink:show="embed" xlink:actuate="onLoad" draw:mime-type="image/png"/></draw:frame></text:p>
      <text:p text:style-name="FigureCaption">Figure 6 : Consultation des documents : filtres, recherche et statuts de fraîcheur.</text:p>
      <text:p text:style-name="FigureWithCaption"><draw:frame draw:style-name="fr3" draw:name="imgArche3" text:anchor-type="as-char" svg:width="10.4cm" svg:height="6.5cm" style:rel-height="scale" draw:z-index="3"><draw:image xlink:href="Pictures/1000000000000B4000000708DF728D40.png" xlink:type="simple" xlink:show="embed" xlink:actuate="onLoad" draw:mime-type="image/png"/></draw:frame></text:p>
      <text:p text:style-name="FigureCaption">Figure 7 : Viewer PDF intégré : lecture du document et métadonnées de collecte.</text:p>
      <text:p text:style-name="Text_20_body">La gestion des sources regroupe la déclaration des serveurs, le test de connexion et le déclenchement manuel d’une synchronisation (figure 8).</text:p>
      <text:p text:style-name="FigureWithCaption"><text:soft-page-break/><draw:frame draw:style-name="fr3" draw:name="imgArche4" text:anchor-type="as-char" svg:width="10.4cm" svg:height="6.5cm" style:rel-height="scale" draw:z-index="4"><draw:image xlink:href="Pictures/1000000000000B4000000708D40118C2.png" xlink:type="simple" xlink:show="embed" xlink:actuate="onLoad" draw:mime-type="image/png"/></draw:frame></text:p>
      <text:p text:style-name="FigureCaption">Figure 8 : Gestion des sources : protocoles, état et synchronisation.</text:p>
      <text:p text:style-name="Text_20_body">L’export ZIP d’une sélection est plafonné à 100 documents et 500 Mo, pour éviter une réponse HTTP qui saturerait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ii.6-api-rest"/><text:bookmark-start text:name="__RefHeading___Toc1121_2390793328"/>3.6 API REST<text:bookmark-end text:name="ii.6-api-rest"/><text:bookmark-end text:name="__RefHeading___Toc1121_2390793328"/></text:h>
      <text:p text:style-name="First_20_paragraph">L’API v1 (<text:span text:style-name="Source_5f_Text">app/routes/api.py</text:span>, documentée via OpenAPI)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choix délibéré : créer ou supprimer une source est une opération rare, mieux servie par les confirmations visuelles de l’interface ; l’API se concentre sur la consultation et le suivi, les vrais besoins d’un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h text:style-name="Heading_20_2" text:outline-level="2"><text:bookmark-start text:name="ii.7-sécurité"/><text:bookmark-start text:name="__RefHeading___Toc1123_2390793328"/>3.7 Sécurité<text:bookmark-end text:name="ii.7-sécurité"/><text:bookmark-end text:name="__RefHeading___Toc1123_2390793328"/></text:h>
      <text:p text:style-name="First_20_paragraph">La sécurité d’Arche repose sur des contrôles complémentaires - aucun ne suffit seul -, regroupés ici par type de menace.</text:p>
      <text:p text:style-name="Text_20_body"><text:soft-page-break/><text:span text:style-name="T5">Contre l’usurpation d’identité</text:span> : Flask-Login gère les sessions côté serveur, avec mots de passe hachés en bcrypt (coût 12) et décorateurs <text:span text:style-name="Source_5f_Text">@require_permission</text:span> sur les routes sensibles. L’authentification peut aussi être déléguée à l’annuaire LDAP de l’établissement. Les tokens Bearer sont stockés hachés en base, révocables immédiatement, et peuvent porter des permissions restreintes. Rôles comme tokens limitent les droits au nécessaire : « Opérateur », par exemple, ne peut pas supprimer une source.</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a été instructive : en l’activant, l’interface a cessé de fonctionner - les scripts inline des templates étaient bloqués comme l’aurait été un script injecté, car la CSP exige que le code légitime soit identifiable. Chaque réponse génère donc un nonce aléatoire, placé dans l’en-tête CSP et dans les balises <text:span text:style-name="Source_5f_Text">&lt;script&gt;</text:span>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ii.8-tests-et-qualité"/><text:bookmark-start text:name="__RefHeading___Toc1125_2390793328"/>3.8 Tests et qualité<text:bookmark-end text:name="ii.8-tests-et-qualité"/><text:bookmark-end text:name="__RefHeading___Toc1125_2390793328"/></text:h>
      <text:p text:style-name="First_20_paragraph">La stratégie de test a privilégié la rapidité et la reproductibilité. Les tests utilisent SQLite en mémoire et un stockage temporaire ; le mode <text:span text:style-name="Source_5f_Text">JOBS_RUN_INLINE=true</text:span> exécute les jobs de fond de façon synchrone. Ce mode est né d’un problème concret : mes premiers tests <text:soft-page-break/>échouaient par intermittence, selon que le thread du job avait fini ou non au moment de l’assertion ; plutôt que des attentes arbitraires (<text:span text:style-name="Source_5f_Text">sleep</text:span>), l’exécution en ligne des jobs rend les assertions déterministes. Résultat : une suite qui tourne en quelques secondes en CI, couvrant modèles, synchronisation, purge, sources, permissions web et API, sécurité, connecteurs, exports, notifications et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ii.9-déploiement-et-exploitation"/><text:bookmark-start text:name="__RefHeading___Toc1127_2390793328"/>3.9 Déploiement et exploitation<text:bookmark-end text:name="ii.9-déploiement-et-exploitation"/><text:bookmark-end text:name="__RefHeading___Toc1127_2390793328"/></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Un redémarrage pendant une synchronisation peut laisser un job inachevé, à relancer manuellement : limite connue, documentée pour l’exploitant (voir section 3.1).</text:p>
      <text:h text:style-name="Heading_20_1" text:outline-level="1"><text:bookmark-start text:name="partie-iii-bilan-et-perspectives"/><text:bookmark-start text:name="__RefHeading___Toc1129_2390793328"/><text:soft-page-break/>4. Bilan et perspectives<text:bookmark-end text:name="partie-iii-bilan-et-perspectives"/><text:bookmark-end text:name="__RefHeading___Toc1129_2390793328"/></text:h>
      <text:h text:style-name="Heading_20_2" text:outline-level="2"><text:bookmark-start text:name="iii.1-résultats-obtenus"/><text:bookmark-start text:name="__RefHeading___Toc1131_2390793328"/>4.1 Résultats obtenus<text:bookmark-end text:name="iii.1-résultats-obtenus"/><text:bookmark-end text:name="__RefHeading___Toc1131_2390793328"/></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es réglages fins de la purge n’ont pas tous été démontrés en recette ; l’API ne couvre pas le CRUD des sources. Trois points restent à valider sur infrastructure réelle : LDAP, SMTP et le benchmark à 500 PDF. Le projet est documenté pour une reprise par la DSI sans dépendre de ma présence.</text:p>
      <text:h text:style-name="Heading_20_2" text:outline-level="2"><text:bookmark-start text:name="iii.2-perspectives-et-évolutions"/><text:bookmark-start text:name="__RefHeading___Toc1133_2390793328"/>4.2 Perspectives et évolutions<text:bookmark-end text:name="iii.2-perspectives-et-évolutions"/><text:bookmark-end text:name="__RefHeading___Toc1133_2390793328"/></text:h>
      <text:p text:style-name="First_20_paragraph"><text:span text:style-name="T5">Priorité haute</text:span> : valider les connecteurs sur infrastructure réelle (SFTP, SMB, LDAP, SMTP) et mesurer le benchmark 500 PDF en moins de 5 minutes - prérequis à toute mise en service.</text:p>
      <text:p text:style-name="Text_20_body"><text:span text:style-name="T5">Priorité moyenne</text:span> : ajouter le CRUD des sources dans l’API REST ; automatiser la sauvegarde de la base, du stockage PDF et du fichier <text:span text:style-name="Source_5f_Text">.env</text:span>.</text:p>
      <text:p text:style-name="Text_20_body"><text:span text:style-name="T5">Priorité basse</text:span> : envisager une migration PostgreSQL si les accès concurrents l’exigent ; faire réaliser un audit de sécurité externe une fois le périmètre de production figé.</text:p>
      <text:h text:style-name="Heading_20_2" text:outline-level="2"><text:bookmark-start text:name="iii.3-accompagnement-du-csu-lors-des-interventions"/><text:bookmark-start text:name="__RefHeading___Toc1135_2390793328"/>4.3 Accompagnement du CSU lors des interventions<text:bookmark-end text:name="iii.3-accompagnement-du-csu-lors-des-interventions"/><text:bookmark-end text:name="__RefHeading___Toc1135_2390793328"/></text:h>
      <text:p text:style-name="First_20_paragraph">Le bilan du stage ne se limite pas à l’application : en plus du développement d’Arche, j’ai accompagné la Cellule de Support aux Utilisateurs (CSU) lors d’interventions sur site (bloc opératoire, urgences, unités d’hospitalisation) et à distance - dépannages de postes, droits d’accès, incidents d’impression, connectivité réseau. Cette seconde mission m’a donné une vision directe du terrain que l’application devait servir : postes partagés, politiques de sécurité strictes, applications métier contrôlées par profil et par service.</text:p>
      <text:p text:style-name="Text_20_body"><text:soft-page-break/>Le contexte hospitalier se distingue surtout par la continuité de service : une panne dans un service de soins perturbe directement la prise en charge des patients. Lors d’une intervention, j’ai vu une unité revenir aux formulaires papier à cause d’une indisponibilité des outils de prescription - exactement le scénario qu’Arche sécurise. Ces accompagnements ont aussi influencé la conception : le personnel hospitalier a des niveaux d’aisance informatique très variables, et une application utilisée en contexte de panne doit afficher des messages d’état compréhensibles et éviter les parcours inutiles.</text:p>
      <text:h text:style-name="Heading_20_1" text:outline-level="1"><text:bookmark-start text:name="difficultés-rencontrées"/><text:bookmark-start text:name="__RefHeading___Toc1141_2390793328"/>5. Difficultés rencontrées<text:bookmark-end text:name="difficultés-rencontrées"/><text:bookmark-end text:name="__RefHeading___Toc1141_2390793328"/></text:h>
      <text:p text:style-name="First_20_paragraph">Les difficultés techniques ponctuelles ont été racontées dans la partie 3, au plus près des choix qu’elles ont provoqués. Cette section revient sur les difficultés transversales, celles qui ont structuré le déroulement du stage.</text:p>
      <text:p text:style-name="Text_20_body"><text:span text:style-name="T5">Mener deux missions de front.</text:span> Les accompagnements du CSU, par nature imprévisibles, morcelaient le temps de développement. Il a fallu protéger des plages continues - une fonctionnalité comme la synchronisation supporte mal le morcellement - tout en restant disponible pour les interventions ; d’où les arbitrages de périmètre évoqués en section 2.4.</text:p>
      <text:p text:style-name="Text_20_body"><text:span text:style-name="T5">Changer de posture sur la sécurité.</text:span> La difficulté la plus formatrice a été de changer de question : ne plus me demander « est-ce que ça marche ? » mais « comment cela peut-il être détourné ? ». Chaque fonctionnalité ajoutée rouvrait la question pour un périmètre nouveau - noms de fichiers distants, exports tableur, chemins, tokens - et c’est ce qui explique le débordement de la phase sécurité sur le planning prévisionnel.</text:p>
      <text:p text:style-name="Text_20_body"><text:span text:style-name="T5">Garantir les mêmes règles sur deux chemins d’accès.</text:span> L’interface web (sessions, CSRF) et l’API (tokens Bearer) doivent appliquer exactement les mêmes permissions métier. J’ai centralisé les vérifications dans des décorateurs communs et verrouillé cette propriété par des tests dédiés : si les deux chemins divergent un jour, un test échouera.</text:p>
      <text:p text:style-name="Text_20_body"><text:span text:style-name="T5">Tester sans l’infrastructure cible.</text:span> SFTP, SMB, LDAP et SMTP ont été simulés avec unittest.mock, ce qui rend reproductibles les succès, les erreurs réseau et les entrées dangereuses. Ces tests valident ma logique, pas la compatibilité réelle avec les serveurs de la DSI - d’où la recette en tête des perspectives.</text:p>
      <text:p text:style-name="Text_20_body"><text:soft-page-break/><text:span text:style-name="T5">Estimer son propre travail.</text:span> Le planning s’est avéré juste dans ses grandes lignes mais optimiste sur les finitions : un connecteur « qui marche » et un connecteur testé, sécurisé et journalisé ne représentent pas le même volume de travail. J’en retiens que le dernier quart d’une fonctionnalité coûte aussi cher que les trois premiers.</text:p>
      <text:h text:style-name="Heading_20_1" text:outline-level="1"><text:bookmark-start text:name="conclusion"/><text:bookmark-start text:name="__RefHeading___Toc1143_2390793328"/>6. Conclusion<text:bookmark-end text:name="conclusion"/><text:bookmark-end text:name="__RefHeading___Toc1143_2390793328"/></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attributs non négociables en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livrer une base maintenable plutôt que multiplier les composants, chaque choix étant comparé aux alternatives et ses limites documentées.</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table-des-illustrations"/><text:bookmark-start text:name="__RefHeading___Toc1157_2390793328"/><text:soft-page-break/>Table des illustrations<text:bookmark-end text:name="table-des-illustrations"/><text:bookmark-end text:name="__RefHeading___Toc1157_2390793328"/></text:h>
      <text:p text:style-name="P17">Figure 1 : Situation avant et après Arche : dispersion des sources et accès centralisé …………………… section 1</text:p>
      <text:p text:style-name="P17">Figure 2 : Architecture applicative d’Arche : couches Flask, services et stockage ……………………….. section 3.2</text:p>
      <text:p text:style-name="P17">Figure 3 : Flux de synchronisation d’un document PDF : déduplication à deux niveaux et écriture contrôlée …… section 3.3</text:p>
      <text:p text:style-name="P17">Figure 4 : Cycle de vie d’un document PDF : états de fraîcheur, transitions et chronologie de purge ……………….. section 3.4</text:p>
      <text:p text:style-name="P17">Figure 5 : Tableau de bord d’Arche : état du parc documentaire et des sources ………………............... section 3.5</text:p>
      <text:p text:style-name="P17">Figure 6 : Consultation des documents : filtres, recherche et statuts de fraîcheur ………………........ section 3.5</text:p>
      <text:p text:style-name="P17">Figure 7 : Viewer PDF intégré : lecture du document et métadonnées de collecte ………………......... section 3.5</text:p>
      <text:p text:style-name="P17">Figure 8 : Gestion des sources : protocoles, état et synchronisation ………………........................... section 3.5</text:p>
      <text:h text:style-name="Heading_20_1" text:outline-level="1"><text:bookmark-start text:name="glossaire"/><text:bookmark-start text:name="__RefHeading___Toc1085_2390793328"/>Glossaire<text:bookmark-end text:name="glossaire"/><text:bookmark-end text:name="__RefHeading___Toc1085_2390793328"/></text:h>
      <text:p text:style-name="P17"><text:span text:style-name="T5">API REST</text:span> : interface de programmation exposée via HTTP, permettant à d’autres logiciels d’interroger l’application.</text:p>
      <text:p text:style-name="P17"><text:span text:style-name="T5">CI</text:span> : Continuous Integration : exécution automatique des tests à chaque modification du code.</text:p>
      <text:p text:style-name="P17"><text:span text:style-name="T5">CRUD</text:span> : Create, Read, Update, Delete : les quatre opérations élémentaires sur une donnée.</text:p>
      <text:p text:style-name="P17"><text:span text:style-name="T5">CSP</text:span> : Content Security Policy : en-tête HTTP limitant les ressources chargées par le navigateur, ce qui réduit la surface d’attaque XSS.</text:p>
      <text:p text:style-name="P17"><text:span text:style-name="T5">CSRF</text:span> : Cross-Site Request Forgery : attaque forçant un navigateur authentifié à envoyer une requête non voulue ; contrée par un jeton sur chaque formulaire.</text:p>
      <text:p text:style-name="P17"><text:span text:style-name="T5">DBA</text:span> : Database Administrator : administrateur de base de données.</text:p>
      <text:p text:style-name="P17"><text:span text:style-name="T5">Docker</text:span> : technologie de conteneurs : l’application et ses dépendances sont empaquetées pour un déploiement reproductible.</text:p>
      <text:p text:style-name="P17"><text:span text:style-name="T5">Fernet</text:span> : schéma de chiffrement symétrique authentifié (AES-128-CBC + HMAC-SHA256), utilisé pour chiffrer les identifiants des sources en base.</text:p>
      <text:p text:style-name="P17"><text:soft-page-break/><text:span text:style-name="T5">Gunicorn</text:span> : serveur d’application Python utilisé en production pour exécuter l’application web.</text:p>
      <text:p text:style-name="P17"><text:span text:style-name="T5">HDS</text:span> : Hébergeur de Données de Santé : certification française encadrant l’hébergement de données médicales.</text:p>
      <text:p text:style-name="P17"><text:span text:style-name="T5">LDAP</text:span> : Lightweight Directory Access Protocol : annuaire d’entreprise ; utilisé ici pour déléguer l’authentification.</text:p>
      <text:p text:style-name="P17"><text:span text:style-name="T5">Mode dégradé</text:span> : procédure ou document utilisé lorsque le fonctionnement normal d’un outil métier n’est plus disponible.</text:p>
      <text:p text:style-name="P17"><text:span text:style-name="T5">Nonce</text:span> : valeur aléatoire à usage unique, exigée par la CSP pour autoriser un script.</text:p>
      <text:p text:style-name="P17"><text:span text:style-name="T5">ORM</text:span> : Object-Relational Mapping : fait correspondre les objets du code aux tables de la base (ici SQLAlchemy).</text:p>
      <text:p text:style-name="P17"><text:span text:style-name="T5">RBAC</text:span> : Role-Based Access Control : les droits sont attribués à des rôles, eux-mêmes assignés aux utilisateurs.</text:p>
      <text:p text:style-name="P17"><text:span text:style-name="T5">Recette</text:span> : tests menés par le destinataire (ici la DSI) pour valider la conformité avant mise en service.</text:p>
      <text:p text:style-name="P17"><text:span text:style-name="T5">SFTP</text:span> : SSH File Transfer Protocol : transfert de fichiers sécurisé via SSH, utilisé pour les sources Linux.</text:p>
      <text:p text:style-name="P17"><text:span text:style-name="T5">SMB/CIFS</text:span> : Server Message Block / Common Internet File System : protocole d’accès aux partages de fichiers Windows.</text:p>
      <text:p text:style-name="P17"><text:span text:style-name="T5">SMTP</text:span> : Simple Mail Transfer Protocol : protocole d’envoi des emails (notifications).</text:p>
      <text:p text:style-name="P17"><text:span text:style-name="T5">SQLite WAL</text:span> : Write-Ahead Logging : mode d’écriture de SQLite améliorant les performances en lecture concurrente.</text:p>
      <text:p text:style-name="P17"><text:span text:style-name="T5">Token Bearer</text:span> : jeton secret transmis dans l’en-tête Authorization ; authentifie les appels à l’API.</text:p>
      <text:p text:style-name="P17"><text:span text:style-name="T5">XSS</text:span> : Cross-Site Scripting : injection d’un script malveillant dans une page consultée par d’autres utilisateurs.</text:p>
      <text:h text:style-name="Heading_20_1" text:outline-level="1"><text:bookmark-start text:name="bibliographie-et-sitographie"/><text:bookmark-start text:name="__RefHeading___Toc1145_2390793328"/>Bibliographie et sitographie<text:bookmark-end text:name="bibliographie-et-sitographie"/><text:bookmark-end text:name="__RefHeading___Toc1145_2390793328"/></text:h>
      <text:h text:style-name="Heading_20_2" text:outline-level="2"><text:bookmark-start text:name="documentation-technique"/><text:bookmark-start text:name="__RefHeading___Toc1147_2390793328"/>Documentation technique<text:bookmark-end text:name="documentation-technique"/><text:bookmark-end text:name="__RefHeading___Toc1147_2390793328"/></text:h>
      <text:list text:style-name="L1">
        <text:list-item>
          <text:p text:style-name="P18">Jordan Borean et al., <text:span text:style-name="T6">smbprotocol Documentation</text:span>, dépôt GitHub du projet smbprotocol, (consulté le 12 juin 2026), disponible sur https://github.com/jborean93/smbprotocol</text:p>
        </text:list-item>
        <text:list-item>
          <text:p text:style-name="P18"><text:soft-page-break/>Jeff Forcier et al., <text:span text:style-name="T6">Paramiko Documentation</text:span>, site officiel de Paramiko, (consulté le 12 juin 2026), disponible sur https://www.paramiko.org/</text:p>
        </text:list-item>
        <text:list-item>
          <text:p text:style-name="P18">Alex Grönholm, <text:span text:style-name="T6">APScheduler Documentation</text:span>, documentation en ligne d’APScheduler, (consulté le 12 juin 2026), disponible sur https://apscheduler.readthedocs.io/</text:p>
        </text:list-item>
        <text:list-item>
          <text:p text:style-name="P18">Pallets, <text:span text:style-name="T6">Flask Documentation v3.x</text:span>, site officiel de Flask, (consulté le 12 juin 2026), disponible sur https://flask.palletsprojects.com/</text:p>
        </text:list-item>
        <text:list-item>
          <text:p text:style-name="P18">Python Cryptographic Authority, <text:span text:style-name="T6">cryptography : Fernet</text:span>, documentation en ligne de cryptography, (consulté le 12 juin 2026), disponible sur https://cryptography.io/en/latest/fernet/</text:p>
        </text:list-item>
        <text:list-item>
          <text:p text:style-name="P18">SQLAlchemy Authors, <text:span text:style-name="T6">SQLAlchemy 2.0 Documentation</text:span>, site officiel de SQLAlchemy, (consulté le 12 juin 2026), disponible sur https://docs.sqlalchemy.org/</text:p>
        </text:list-item>
      </text:list>
      <text:h text:style-name="Heading_20_2" text:outline-level="2"><text:bookmark-start text:name="sources-institutionnelles"/><text:bookmark-start text:name="__RefHeading___Toc1149_2390793328"/>Sources institutionnelles<text:bookmark-end text:name="sources-institutionnelles"/><text:bookmark-end text:name="__RefHeading___Toc1149_2390793328"/></text:h>
      <text:list text:style-name="L2">
        <text:list-item>
          <text:p text:style-name="P19">ANS (Agence du Numérique en Santé), <text:span text:style-name="T6">Certification HDS</text:span>, portail e-santé du ministère de la Santé, (consulté le 12 juin 2026), disponible sur https://esante.gouv.fr/labels-certifications/hds</text:p>
        </text:list-item>
        <text:list-item>
          <text:p text:style-name="P19">ANSSI, <text:span text:style-name="T6">Guide des bonnes pratiques de l’informatique</text:span>, site officiel de l’ANSSI, (consulté le 12 juin 2026), disponible sur https://www.ssi.gouv.fr/guide/bonnes-pratiques-de-linformatique/</text:p>
        </text:list-item>
        <text:list-item>
          <text:p text:style-name="P19">Centre Antoine Lacassagne, <text:span text:style-name="T6">Site institutionnel du Centre Antoine Lacassagne</text:span>, site officiel de l’établissement, (consulté le 12 juin 2026), disponible sur https://www.centreantoinelacassagne.org/</text:p>
        </text:list-item>
        <text:list-item>
          <text:p text:style-name="P19">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line-height="115%"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line-height="115%"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line-height="115%" fo:text-indent="0cm" style:auto-text-indent="false">
        <style:tab-stops>
          <style:tab-stop style:position="16.011cm" style:type="right" style:leader-style="dotted" style:leader-text="."/>
        </style:tab-stops>
      </style:paragraph-properties>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5:39:57.801151600</dc:date>
    <meta:editing-duration>PT16M33S</meta:editing-duration>
    <meta:editing-cycles>9</meta:editing-cycles>
    <meta:document-statistic meta:table-count="0" meta:image-count="10" meta:object-count="0" meta:page-count="25" meta:paragraph-count="257" meta:word-count="6374" meta:character-count="42581" meta:non-whitespace-character-count="36409"/>
    <meta:user-defined meta:name="date">15 avril - 13 juin 2026</meta:user-defined>
    <meta:user-defined meta:name="subtitle">Rapport de stage - Bachelor Universitaire de Technologie Informatique - Année 2025-2026</meta:user-defined>
  </office:meta>
</office:document-meta>
</file>