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Illustration_20_Index_20_1">
      <style:paragraph-properties>
        <style:tab-stops>
          <style:tab-stop style:position="16cm" style:type="right" style:leader-style="dotted" style:leader-text="."/>
        </style:tab-stops>
      </style:paragraph-properties>
    </style:style>
    <style:style style:name="P18" style:family="paragraph" style:parent-style-name="Text_20_body">
      <style:paragraph-properties fo:line-height="115%"/>
    </style:style>
    <style:style style:name="P19" style:family="paragraph" style:parent-style-name="Text_20_body" style:list-style-name="L1">
      <style:paragraph-properties fo:margin-top="0cm" fo:margin-bottom="0cm" style:contextual-spacing="false" fo:line-height="115%"/>
    </style:style>
    <style:style style:name="P20" style:family="paragraph" style:parent-style-name="Text_20_body" style:list-style-name="L2">
      <style:paragraph-properties fo:margin-top="0cm" fo:margin-bottom="0cm" style:contextual-spacing="false" fo:line-height="115%"/>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text:p>
      <text:p text:style-name="Text_20_body">L’application livrée, Arche (Flask, SQLAlchemy, SQLite, APScheduler, Docker),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summary"/><text:bookmark-start text:name="__RefHeading___Toc1363_2524517924"/><text:soft-page-break/>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7</text:a></text:p>
          <text:p text:style-name="P15"><text:a xlink:type="simple" xlink:href="#__RefHeading___Toc1125_2390793328" text:style-name="Index_20_Link" text:visited-style-name="Index_20_Link">3.8 Tests et qualité<text:tab/>18</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u CSU lors des interventions<text:tab/>20</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157_2390793328" text:style-name="Index_20_Link" text:visited-style-name="Index_20_Link">Table des illustrations<text:tab/>22</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4</text:a></text:p>
        </text:index-body>
      </text:table-of-content>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width="10.881cm" style:rel-width="68%" svg:height="7.819cm" style:rel-height="scale" draw:z-index="0"><draw:image xlink:href="Pictures/100000000000060000000450CE76039B.png" xlink:type="simple" xlink:show="embed" xlink:actuate="onLoad" draw:mime-type="image/png"/></draw:frame></text:p>
      <text:p text:style-name="FigureCaption">Figure <text:sequence text:ref-name="refFigure0" text:name="Figure" style:num-format="1">1</text:sequence><text:s/>: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niçois, membre du réseau Unicancer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complexe pour une application interne : SQLite acceptable, pas de serveur de base de données externe, déploiement par conteneur Docker, configuration par variables d’environn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__RefHeading___Toc1097_2390793328"/><text:bookmark-start text:name="i.4-cahier-des-charges-et-matrice-des-exigences"/><text:soft-page-break/>2.4 Cahier des charges et planning<text:bookmark-end text:name="__RefHeading___Toc1097_2390793328"/><text:bookmark-end text:name="i.4-cahier-des-charges-et-matrice-des-exigences"/></text:h>
      <text:p text:style-name="First_20_paragraph">Le cahier des charges de la DSI détaille les exigence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text:soft-page-break/>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en couches n’est pas anodin : au départ, les premières routes mélangeaient logique d’accès réseau, règles de stockage et rendu HTML - ce qui rendait les tests impossibles et les bugs difficiles à isoler. Séparer les couches a été la première décision structurelle du projet.</text:p>
      <text:p text:style-name="Text_20_body"><text:soft-page-break/>La figure 2 positionne Arche entre les sources hétérogènes, les utilisateurs web et les clients API.</text:p>
      <text:p text:style-name="FigureWithCaption"><draw:frame draw:style-name="fr2"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text:sequence text:ref-name="refFigure1" text:name="Figure" style:num-format="1">2</text:sequence><text:s/>: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deux mécanismes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text:soft-page-break/>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autorise un déclenchement en retard plutôt qu’une exécution de rattrapage en rafal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 couches séparées, jobs maîtrisés, base fiabilisée -,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text:soft-page-break/>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conversion locale n’intervient qu’à l’affichage ; un petit utilitaire normalise les dates entrantes :</text:p>
      <text:p text:style-name="Preformatted_20_Text"><text:soft-page-break/>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text:sequence text:ref-name="refFigure2" text:name="Figure" style:num-format="1">3</text:sequence><text:s/>: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text:soft-page-break/>3.4 Fraîcheur, purge et corbeille<text:bookmark-end text:name="__RefHeading___Toc1117_2390793328"/><text:bookmark-end text:name="ii.4-fraîcheur-purge-et-corbeille"/></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2"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text:sequence text:ref-name="refFigure3" text:name="Figure" style:num-format="1">4</text:sequence><text:s/>: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text:soft-page-break/>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3" draw:name="imgArche1" text:anchor-type="as-char" svg:width="10.4cm" svg:height="6.5cm" style:rel-height="scale" draw:z-index="1"><draw:image xlink:href="Pictures/1000000000000B4000000708D0DE0DB3.png" xlink:type="simple" xlink:show="embed" xlink:actuate="onLoad" draw:mime-type="image/png"/></draw:frame></text:p>
      <text:p text:style-name="FigureCaption">Figure <text:sequence text:ref-name="refFigure4" text:name="Figure" style:num-format="1">5</text:sequence><text:s/>: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3" draw:name="imgArche2" text:anchor-type="as-char" svg:width="10.4cm" svg:height="6.5cm" style:rel-height="scale" draw:z-index="2"><draw:image xlink:href="Pictures/1000000000000B4000000708B3A484D4.png" xlink:type="simple" xlink:show="embed" xlink:actuate="onLoad" draw:mime-type="image/png"/></draw:frame></text:p>
      <text:p text:style-name="FigureCaption">Figure <text:sequence text:ref-name="refFigure5" text:name="Figure" style:num-format="1">6</text:sequence><text:s/>: Consultation des documents : filtres, recherche et statuts de fraîcheur.</text:p>
      <text:p text:style-name="FigureWithCaption"><draw:frame draw:style-name="fr3" draw:name="imgArche3" text:anchor-type="as-char" svg:width="10.4cm" svg:height="6.5cm" style:rel-height="scale" draw:z-index="3"><draw:image xlink:href="Pictures/1000000000000B4000000708DF728D40.png" xlink:type="simple" xlink:show="embed" xlink:actuate="onLoad" draw:mime-type="image/png"/></draw:frame></text:p>
      <text:p text:style-name="FigureCaption">Figure <text:sequence text:ref-name="refFigure6" text:name="Figure" style:num-format="1">7</text:sequence><text:s/>: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3" draw:name="imgArche4" text:anchor-type="as-char" svg:width="10.4cm" svg:height="6.5cm" style:rel-height="scale" draw:z-index="4"><draw:image xlink:href="Pictures/1000000000000B4000000708D40118C2.png" xlink:type="simple" xlink:show="embed" xlink:actuate="onLoad" draw:mime-type="image/png"/></draw:frame></text:p>
      <text:p text:style-name="FigureCaption">Figure <text:sequence text:ref-name="refFigure7" text:name="Figure" style:num-format="1">8</text:sequence><text:s/>: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des contrôles complémentaires - aucun ne suffit seul -, regroupés ici par type de menace.</text:p>
      <text:p text:style-name="Text_20_body"><text:soft-page-break/><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text:soft-page-break/>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__RefHeading___Toc1129_2390793328"/><text:bookmark-start text:name="partie-iii-bilan-et-perspectives"/><text:soft-page-break/>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n’ont pas tous été démontrés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ajouter le CRUD des sources dans l’API REST ; automatiser la sauvegarde de la base, du stockage PDF et du fichier <text:span text:style-name="Source_5f_Text">.env</text:span>.</text:p>
      <text:p text:style-name="Text_20_body"><text:span text:style-name="T5">Priorité basse</text:span> : envisager une migration PostgreSQL si les accès concurrents l’exigent ; faire réaliser un audit de sécurité externe une fois le périmètre de production figé.</text:p>
      <text:h text:style-name="Heading_20_2" text:outline-level="2"><text:bookmark-start text:name="__RefHeading___Toc1135_2390793328"/><text:bookmark-start text:name="iii.3-accompagnement-du-csu-lors-des-interventions"/>4.3 Accompagnement du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text:soft-page-break/>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__RefHeading___Toc1141_2390793328"/><text:bookmark-start text:name="difficultés-rencontrées"/>5. Difficultés rencontrées<text:bookmark-end text:name="__RefHeading___Toc1141_2390793328"/><text:bookmark-end text:name="difficultés-rencontrées"/></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accompagnements du CSU, par nature imprévisibles, morcelaient le temps de développement. Il a fallu protéger des plages continues - une fonctionnalité comme la synchronisation supporte mal le morcellement - tout en restant disponible pour les interventions ; d’où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oft-page-break/><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attributs non négociables en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illustration-index text:style-name="Sect1" text:protected="true" text:name="Table des illustrations1">
        <text:illustration-index-source text:caption-sequence-name="Figure" text:caption-sequence-format="text">
          <text:index-title-template text:style-name="Figure_20_Index_20_Heading">Index des figures</text:index-title-template>
          <text:illustration-index-entry-template text:style-name="Illustration_20_Index_20_1">
            <text:index-entry-link-start text:style-name="Internet_20_link"/>
            <text:index-entry-text/>
            <text:index-entry-tab-stop style:type="right" style:leader-char="."/>
            <text:index-entry-page-number/>
            <text:index-entry-link-end/>
          </text:illustration-index-entry-template>
        </text:illustration-index-source>
        <text:index-body>
          <text:index-title text:style-name="Sect1" text:name="Table des illustrations1_Head" text:protected="true">
            <text:p text:style-name="Figure_20_Index_20_Heading"><text:soft-page-break/>Index des figures</text:p>
          </text:index-title>
          <text:p text:style-name="P17"><text:a xlink:type="simple" xlink:href="#Figure!0%7Csequence" text:style-name="Internet_20_link" text:visited-style-name="Internet_20_link">Figure 1 : Situation avant et après Arche : dispersion des sources et accès centralisé.<text:tab/>5</text:a></text:p>
          <text:p text:style-name="P17"><text:a xlink:type="simple" xlink:href="#Figure!1%7Csequence" text:style-name="Internet_20_link" text:visited-style-name="Internet_20_link">Figure 2 : Architecture applicative d’Arche : couches Flask, services et stockage.<text:tab/>10</text:a></text:p>
          <text:p text:style-name="P17"><text:a xlink:type="simple" xlink:href="#Figure!2%7Csequence" text:style-name="Internet_20_link" text:visited-style-name="Internet_20_link">Figure 3 : Flux de synchronisation d’un document PDF : déduplication à deux niveaux et écriture contrôlée.<text:tab/>13</text:a></text:p>
          <text:p text:style-name="P17"><text:a xlink:type="simple" xlink:href="#Figure!3%7Csequence" text:style-name="Internet_20_link" text:visited-style-name="Internet_20_link">Figure 4 : Cycle de vie d’un document PDF : états de fraîcheur, transitions et chronologie de purge.<text:tab/>14</text:a></text:p>
          <text:p text:style-name="P17"><text:a xlink:type="simple" xlink:href="#Figure!4%7Csequence" text:style-name="Internet_20_link" text:visited-style-name="Internet_20_link">Figure 5 : Tableau de bord d’Arche : état du parc documentaire et des sources.<text:tab/>15</text:a></text:p>
          <text:p text:style-name="P17"><text:a xlink:type="simple" xlink:href="#Figure!5%7Csequence" text:style-name="Internet_20_link" text:visited-style-name="Internet_20_link">Figure 6 : Consultation des documents : filtres, recherche et statuts de fraîcheur.<text:tab/>16</text:a></text:p>
          <text:p text:style-name="P17"><text:a xlink:type="simple" xlink:href="#Figure!6%7Csequence" text:style-name="Internet_20_link" text:visited-style-name="Internet_20_link">Figure 7 : Viewer PDF intégré : lecture du document et métadonnées de collecte.<text:tab/>16</text:a></text:p>
          <text:p text:style-name="P17"><text:a xlink:type="simple" xlink:href="#Figure!7%7Csequence" text:style-name="Internet_20_link" text:visited-style-name="Internet_20_link">Figure 8 : Gestion des sources : protocoles, état et synchronisation.<text:tab/>17</text:a></text:p>
        </text:index-body>
      </text:illustration-index>
      <text:h text:style-name="Heading_20_1" text:outline-level="1"><text:bookmark-start text:name="__RefHeading___Toc1085_2390793328"/><text:bookmark-start text:name="glossaire"/>Glossaire<text:bookmark-end text:name="__RefHeading___Toc1085_2390793328"/><text:bookmark-end text:name="glossaire"/></text:h>
      <text:p text:style-name="P18"><text:span text:style-name="T5">API REST</text:span> : interface de programmation exposée via HTTP, permettant à d’autres logiciels d’interroger l’application.</text:p>
      <text:p text:style-name="P18"><text:span text:style-name="T5">CI</text:span> : Continuous Integration : exécution automatique des tests à chaque modification du code.</text:p>
      <text:p text:style-name="P18"><text:span text:style-name="T5">CRUD</text:span> : Create, Read, Update, Delete : les quatre opérations élémentaires sur une donnée.</text:p>
      <text:p text:style-name="P18"><text:span text:style-name="T5">CSP</text:span> : Content Security Policy : en-tête HTTP limitant les ressources chargées par le navigateur, ce qui réduit la surface d’attaque XSS.</text:p>
      <text:p text:style-name="P18"><text:span text:style-name="T5">CSRF</text:span> : Cross-Site Request Forgery : attaque forçant un navigateur authentifié à envoyer une requête non voulue ; contrée par un jeton sur chaque formulaire.</text:p>
      <text:p text:style-name="P18"><text:span text:style-name="T5">DBA</text:span> : Database Administrator : administrateur de base de données.</text:p>
      <text:p text:style-name="P18"><text:span text:style-name="T5">Docker</text:span> : technologie de conteneurs : l’application et ses dépendances sont empaquetées pour un déploiement reproductible.</text:p>
      <text:p text:style-name="P18"><text:span text:style-name="T5">Fernet</text:span> : schéma de chiffrement symétrique authentifié (AES-128-CBC + HMAC-SHA256), utilisé pour chiffrer les identifiants des sources en base.</text:p>
      <text:p text:style-name="P18"><text:span text:style-name="T5">Gunicorn</text:span> : serveur d’application Python utilisé en production pour exécuter l’application web.</text:p>
      <text:p text:style-name="P18"><text:span text:style-name="T5">HDS</text:span> : Hébergeur de Données de Santé : certification française encadrant l’hébergement de données médicales.</text:p>
      <text:p text:style-name="P18"><text:span text:style-name="T5">LDAP</text:span> : Lightweight Directory Access Protocol : annuaire d’entreprise ; utilisé ici pour déléguer l’authentification.</text:p>
      <text:p text:style-name="P18"><text:soft-page-break/><text:span text:style-name="T5">Mode dégradé</text:span> : procédure ou document utilisé lorsque le fonctionnement normal d’un outil métier n’est plus disponible.</text:p>
      <text:p text:style-name="P18"><text:span text:style-name="T5">Nonce</text:span> : valeur aléatoire à usage unique, exigée par la CSP pour autoriser un script.</text:p>
      <text:p text:style-name="P18"><text:span text:style-name="T5">ORM</text:span> : Object-Relational Mapping : fait correspondre les objets du code aux tables de la base (ici SQLAlchemy).</text:p>
      <text:p text:style-name="P18"><text:span text:style-name="T5">RBAC</text:span> : Role-Based Access Control : les droits sont attribués à des rôles, eux-mêmes assignés aux utilisateurs.</text:p>
      <text:p text:style-name="P18"><text:span text:style-name="T5">Recette</text:span> : tests menés par le destinataire (ici la DSI) pour valider la conformité avant mise en service.</text:p>
      <text:p text:style-name="P18"><text:span text:style-name="T5">SFTP</text:span> : SSH File Transfer Protocol : transfert de fichiers sécurisé via SSH, utilisé pour les sources Linux.</text:p>
      <text:p text:style-name="P18"><text:span text:style-name="T5">SMB/CIFS</text:span> : Server Message Block / Common Internet File System : protocole d’accès aux partages de fichiers Windows.</text:p>
      <text:p text:style-name="P18"><text:span text:style-name="T5">SMTP</text:span> : Simple Mail Transfer Protocol : protocole d’envoi des emails (notifications).</text:p>
      <text:p text:style-name="P18"><text:span text:style-name="T5">SQLite WAL</text:span> : Write-Ahead Logging : mode d’écriture de SQLite améliorant les performances en lecture concurrente.</text:p>
      <text:p text:style-name="P18"><text:span text:style-name="T5">Token Bearer</text:span> : jeton secret transmis dans l’en-tête Authorization ; authentifie les appels à l’API.</text:p>
      <text:p text:style-name="P18"><text:span text:style-name="T5">XSS</text:span> : Cross-Site Scripting : injection d’un script malveillant dans une page consultée par d’autres utilisateurs.</text:p>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1">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Pallets, <text:span text:style-name="T6">Flask Documentation v3.x</text:span>, site officiel de Flask, (consulté le 12 juin 2026), disponible sur https://flask.palletsprojects.com/</text:p>
        </text:list-item>
        <text:list-item>
          <text:p text:style-name="P19"><text:soft-page-break/>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Sources institutionnelles<text:bookmark-end text:name="__RefHeading___Toc1149_2390793328"/><text:bookmark-end text:name="sources-institutionnelles"/></text:h>
      <text:list text:style-name="L2">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top="0cm" fo:margin-bottom="0.049cm" style:contextual-spacing="false" fo:line-height="115%" fo:text-align="start" style:justify-single-word="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6:03:30.929563600</dc:date>
    <meta:editing-duration>PT16M34S</meta:editing-duration>
    <meta:editing-cycles>10</meta:editing-cycles>
    <meta:document-statistic meta:table-count="0" meta:image-count="10" meta:object-count="0" meta:page-count="25" meta:paragraph-count="258" meta:word-count="6361" meta:character-count="42415" meta:non-whitespace-character-count="36257"/>
    <meta:user-defined meta:name="date">15 avril - 13 juin 2026</meta:user-defined>
    <meta:user-defined meta:name="subtitle">Rapport de stage - Bachelor Universitaire de Technologie Informatique - Année 2025-2026</meta:user-defined>
  </office:meta>
</office:document-meta>
</file>