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5C4000004297610F030.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line-height="115%"/>
    </style:style>
    <style:style style:name="P19" style:family="paragraph" style:parent-style-name="Text_20_body" style:list-style-name="L1">
      <style:paragraph-properties fo:margin-top="0cm" fo:margin-bottom="0cm" style:contextual-spacing="false" fo:line-height="115%"/>
    </style:style>
    <style:style style:name="P20"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remerciements"/><text:bookmark-start text:name="__RefHeading___Toc1079_2390793328"/>Remerciements<text:bookmark-end text:name="remerciements"/><text:bookmark-end text:name="__RefHeading___Toc1079_2390793328"/></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résumé"/><text:bookmark-start text:name="__RefHeading___Toc1081_2390793328"/>Résumé<text:bookmark-end text:name="résumé"/><text:bookmark-end text:name="__RefHeading___Toc1081_2390793328"/></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Hébergeur de Données de Santé) sans compliquer l’accès en situation de panne, et rester assez simple pour être exploité durablement par la DSI.</text:p>
      <text:p text:style-name="Text_20_body">L’application livrée, Arche,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__RefHeading___Toc1363_2524517924"/><text:bookmark-start text:name="summary"/><text:soft-page-break/>Summary<text:bookmark-end text:name="__RefHeading___Toc1363_2524517924"/><text:bookmark-end text:name="summary"/></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u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3</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4</text:a></text:p>
        </text:index-body>
      </text:table-of-content>
      <text:h text:style-name="Heading_20_1" text:outline-level="1"><text:bookmark-start text:name="introduction"/><text:bookmark-start text:name="__RefHeading___Toc1087_2390793328"/>1. Introduction<text:bookmark-end text:name="introduction"/><text:bookmark-end text:name="__RefHeading___Toc1087_2390793328"/></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y="-5.597cm" svg:width="10.881cm" style:rel-width="68%" svg:height="7.819cm" style:rel-height="scale" draw:z-index="0"><draw:image xlink:href="Pictures/10000000000005C4000004297610F030.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partie-i-analyse-de-la-situation"/><text:bookmark-start text:name="__RefHeading___Toc1089_2390793328"/>2. Analyse de la situation<text:bookmark-end text:name="partie-i-analyse-de-la-situation"/><text:bookmark-end text:name="__RefHeading___Toc1089_2390793328"/></text:h>
      <text:h text:style-name="Heading_20_2" text:outline-level="2"><text:bookmark-start text:name="i.1-présentation-du-centre-antoine-lacassagne"/><text:bookmark-start text:name="__RefHeading___Toc1091_2390793328"/>2.1 Présentation du Centre Antoine Lacassagne<text:bookmark-end text:name="i.1-présentation-du-centre-antoine-lacassagne"/><text:bookmark-end text:name="__RefHeading___Toc1091_2390793328"/></text:h>
      <text:p text:style-name="First_20_paragraph">Le Centre Antoine Lacassagne (CAL) est un Centre de Lutte Contre le Cancer (CLCC) niçois, membre du réseau Unicancer, qui fédère les CLCC français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i.2-service-dsi-et-contraintes-hds"/><text:bookmark-start text:name="__RefHeading___Toc1093_2390793328"/>2.2 Service DSI et contraintes HDS<text:bookmark-end text:name="i.2-service-dsi-et-contraintes-hds"/><text:bookmark-end text:name="__RefHeading___Toc1093_2390793328"/></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lourde pendant le développement : SQLite comme base de travail, déploiement par conteneur Docker, configuration par variables d’environnement. La mise en production, elle, est prévue sur le serveur PostgreSQL de l’établissement.</text:p>
      <text:h text:style-name="Heading_20_2" text:outline-level="2"><text:bookmark-start text:name="i.3-analyse-des-besoins"/><text:bookmark-start text:name="__RefHeading___Toc1095_2390793328"/>2.3 Analyse des besoins<text:bookmark-end text:name="i.3-analyse-des-besoins"/><text:bookmark-end text:name="__RefHeading___Toc1095_2390793328"/></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i.4-cahier-des-charges-et-matrice-des-exigences"/><text:bookmark-start text:name="__RefHeading___Toc1097_2390793328"/><text:soft-page-break/>2.4 Cahier des charges et planning<text:bookmark-end text:name="i.4-cahier-des-charges-et-matrice-des-exigences"/><text:bookmark-end text:name="__RefHeading___Toc1097_2390793328"/></text:h>
      <text:p text:style-name="First_20_paragraph">Le cahier des charges de la DSI couvre sept volet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partie-ii-conception-et-réalisation"/><text:bookmark-start text:name="__RefHeading___Toc1099_2390793328"/>3. Conception et réalisation<text:bookmark-end text:name="partie-ii-conception-et-réalisation"/><text:bookmark-end text:name="__RefHeading___Toc1099_2390793328"/></text:h>
      <text:h text:style-name="Heading_20_2" text:outline-level="2"><text:bookmark-start text:name="ii.1-choix-technologiques-et-argumentation"/><text:bookmark-start text:name="__RefHeading___Toc1101_2390793328"/>3.1 Choix technologiques et argumentation<text:bookmark-end text:name="ii.1-choix-technologiques-et-argumentation"/><text:bookmark-end text:name="__RefHeading___Toc1101_2390793328"/></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backend-flask"/><text:bookmark-start text:name="__RefHeading___Toc1103_2390793328"/>Backend : Flask<text:bookmark-end text:name="backend-flask"/><text:bookmark-end text:name="__RefHeading___Toc1103_2390793328"/></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base-de-données-sqlite-via-sqlalchemy"/><text:bookmark-start text:name="__RefHeading___Toc1105_2390793328"/><text:soft-page-break/>Base de données : SQLite via SQLAlchemy<text:bookmark-end text:name="base-de-données-sqlite-via-sqlalchemy"/><text:bookmark-end text:name="__RefHeading___Toc1105_2390793328"/></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pour la mise en production prévue sur PostgreSQL, SQLAlchemy permet ce changement sans réécrire la couche de données.</text:p>
      <text:h text:style-name="Heading_20_3" text:outline-level="3"><text:bookmark-start text:name="file-de-jobs-threadpoolexecutor"/><text:bookmark-start text:name="__RefHeading___Toc1107_2390793328"/>File de jobs : ThreadPoolExecutor<text:bookmark-end text:name="file-de-jobs-threadpoolexecutor"/><text:bookmark-end text:name="__RefHeading___Toc1107_2390793328"/></text:h>
      <text:p text:style-name="First_20_paragraph">Un <text:span text:style-name="Source_5f_Text">ThreadPoolExecutor</text:span> interne suffit pour quelques dizaines de synchronisations par jour - sans dépendance supplémentaire. Les tâches périodiques, elles, relèvent d’APScheduler (section 3.2) ; le pool prend en charge les jobs lancés à la demand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chiffrement-des-identifiants-fernet"/><text:bookmark-start text:name="__RefHeading___Toc1109_2390793328"/>Chiffrement des identifiants : Fernet<text:bookmark-end text:name="chiffrement-des-identifiants-fernet"/><text:bookmark-end text:name="__RefHeading___Toc1109_2390793328"/></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ii.2-architecture-applicative"/><text:bookmark-start text:name="__RefHeading___Toc1111_2390793328"/>3.2 Architecture applicative<text:bookmark-end text:name="ii.2-architecture-applicative"/><text:bookmark-end text:name="__RefHeading___Toc1111_2390793328"/></text:h>
      <text:p text:style-name="First_20_paragraph">Arche est un monolithe Flask - une seule application déployée d’un bloc - organisé en couches distinctes. Ce découpage n’était pas là au départ : les premières routes mélangeaient logique d’accès réseau, règles de stockage et rendu HTML - ce qui rendait les tests <text:soft-page-break/>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3"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les-jobs-planifiés-trois-leçons-sur-la-concurrence"/><text:bookmark-start text:name="__RefHeading___Toc1113_2390793328"/>Les jobs planifiés : trois leçons sur la concurrence<text:bookmark-end text:name="les-jobs-planifiés-trois-leçons-sur-la-concurrence"/><text:bookmark-end text:name="__RefHeading___Toc1113_2390793328"/></text:h>
      <text:p text:style-name="First_20_paragraph">Cette architecture a été mise à l’épreuve par les jobs planifiés. APScheduler exécute chaque tâche périodique - synchronisation par source, purge à 2 h et nettoyage de la corbeille à 3 h (tous deux détaillés en section 3.4), rapport de conformité à 8 h (un état quotidien de la <text:soft-page-break/>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tolère jusqu’à une minute de retard au déclenchement ; au-delà, l’exécution manquée est abandonnée plutôt que rattrapé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le cœur fonctionnel restait à construire : la collecte des documents elle-même.</text:p>
      <text:h text:style-name="Heading_20_2" text:outline-level="2"><text:bookmark-start text:name="ii.3-sources-et-synchronisation"/><text:bookmark-start text:name="__RefHeading___Toc1115_2390793328"/>3.3 Sources et synchronisation<text:bookmark-end text:name="ii.3-sources-et-synchronisation"/><text:bookmark-end text:name="__RefHeading___Toc1115_2390793328"/></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text:soft-page-break/>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text:soft-page-break/>conversion locale n’intervient qu’à l’affichage ;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3"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text:soft-page-break/>La synchronisation répond à la question « comment collecter efficacement ». Restait la question symétrique, tout aussi importante pour la DSI : que deviennent les documents qui vieillissent ?</text:p>
      <text:h text:style-name="Heading_20_2" text:outline-level="2"><text:bookmark-start text:name="ii.4-fraîcheur-purge-et-corbeille"/><text:bookmark-start text:name="__RefHeading___Toc1117_2390793328"/>3.4 Fraîcheur, purge et corbeille<text:bookmark-end text:name="ii.4-fraîcheur-purge-et-corbeille"/><text:bookmark-end text:name="__RefHeading___Toc1117_2390793328"/></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3"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text:soft-page-break/>Ces mécanismes tournent en arrière-plan ; pour l’utilisateur, ils se résument à un badge de couleur sur chaque document. C’est l’interface web qui rend ce travail visible.</text:p>
      <text:h text:style-name="Heading_20_2" text:outline-level="2"><text:bookmark-start text:name="ii.5-interface-web-et-parcours-utilisateur"/><text:bookmark-start text:name="__RefHeading___Toc1119_2390793328"/>3.5 Interface web et parcours utilisateur<text:bookmark-end text:name="ii.5-interface-web-et-parcours-utilisateur"/><text:bookmark-end text:name="__RefHeading___Toc1119_2390793328"/></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4"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4"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4"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4"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ii.6-api-rest"/><text:bookmark-start text:name="__RefHeading___Toc1121_2390793328"/>3.6 API REST<text:bookmark-end text:name="ii.6-api-rest"/><text:bookmark-end text:name="__RefHeading___Toc1121_2390793328"/></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ii.7-sécurité"/><text:bookmark-start text:name="__RefHeading___Toc1123_2390793328"/>3.7 Sécurité<text:bookmark-end text:name="ii.7-sécurité"/><text:bookmark-end text:name="__RefHeading___Toc1123_2390793328"/></text:h>
      <text:p text:style-name="First_20_paragraph">La sécurité d’Arche repose sur des contrôles complémentaires (aucun ne suffit seul), regroupés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Content Security Policy)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ii.8-tests-et-qualité"/><text:bookmark-start text:name="__RefHeading___Toc1125_2390793328"/>3.8 Tests et qualité<text:bookmark-end text:name="ii.8-tests-et-qualité"/><text:bookmark-end text:name="__RefHeading___Toc1125_2390793328"/></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ii.9-déploiement-et-exploitation"/><text:bookmark-start text:name="__RefHeading___Toc1127_2390793328"/>3.9 Déploiement et exploitation<text:bookmark-end text:name="ii.9-déploiement-et-exploitation"/><text:bookmark-end text:name="__RefHeading___Toc1127_2390793328"/></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partie-iii-bilan-et-perspectives"/><text:bookmark-start text:name="__RefHeading___Toc1129_2390793328"/><text:soft-page-break/>4. Bilan et perspectives<text:bookmark-end text:name="partie-iii-bilan-et-perspectives"/><text:bookmark-end text:name="__RefHeading___Toc1129_2390793328"/></text:h>
      <text:h text:style-name="Heading_20_2" text:outline-level="2"><text:bookmark-start text:name="iii.1-résultats-obtenus"/><text:bookmark-start text:name="__RefHeading___Toc1131_2390793328"/>4.1 Résultats obtenus<text:bookmark-end text:name="iii.1-résultats-obtenus"/><text:bookmark-end text:name="__RefHeading___Toc1131_2390793328"/></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restent à démontrer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iii.2-perspectives-et-évolutions"/><text:bookmark-start text:name="__RefHeading___Toc1133_2390793328"/>4.2 Perspectives et évolutions<text:bookmark-end text:name="iii.2-perspectives-et-évolutions"/><text:bookmark-end text:name="__RefHeading___Toc1133_2390793328"/></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réaliser la migration vers PostgreSQL prévue pour la mise en production ; ajouter le CRUD des sources dans l’API REST ; automatiser la sauvegarde de la base, du stockage PDF et du fichier <text:span text:style-name="Source_5f_Text">.env</text:span>.</text:p>
      <text:p text:style-name="Text_20_body"><text:span text:style-name="T5">Priorité basse</text:span> : faire réaliser un audit de sécurité externe une fois le périmètre de production figé.</text:p>
      <text:h text:style-name="Heading_20_2" text:outline-level="2"><text:bookmark-start text:name="iii.3-accompagnement-du-csu-lors-des-interventions"/><text:bookmark-start text:name="__RefHeading___Toc1135_2390793328"/>4.3 Accompagnement du CSU lors des interventions<text:bookmark-end text:name="iii.3-accompagnement-du-csu-lors-des-interventions"/><text:bookmark-end text:name="__RefHeading___Toc1135_2390793328"/></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difficultés-rencontrées"/><text:bookmark-start text:name="__RefHeading___Toc1141_2390793328"/>5. Difficultés rencontrées<text:bookmark-end text:name="difficultés-rencontrées"/><text:bookmark-end text:name="__RefHeading___Toc1141_2390793328"/></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accompagnements du CSU, par nature imprévisibles, morcelaient le temps de développement. Il a fallu protéger des plages continues - une fonctionnalité comme la synchronisation supporte mal le morcellement - tout en restant disponible pour les interventions ; d’où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conclusion"/><text:bookmark-start text:name="__RefHeading___Toc1143_2390793328"/>6. Conclusion<text:bookmark-end text:name="conclusion"/><text:bookmark-end text:name="__RefHeading___Toc1143_2390793328"/></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qualités qu’impose le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table-des-illustrations"/><text:bookmark-start text:name="__RefHeading___Toc1157_2390793328"/>Table des illustrations<text:bookmark-end text:name="table-des-illustrations"/><text:bookmark-end text:name="__RefHeading___Toc1157_2390793328"/></text:h>
      <text:illustration-index text:style-name="Sect1" text:protected="true" text:name="Table des illustrations1">
        <text:illustration-index-source text:caption-sequence-name="Figure" text:caption-sequence-format="text">
          <text:index-title-template text:style-name="Figure_20_Index_20_Heading"/>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ternet_20_link" text:visited-style-name="Internet_20_link"><text:soft-page-break/>Figure 1 : Situation avant et après Arche : dispersion des sources et accès centralisé.<text:tab/>5</text:a></text:p>
          <text:p text:style-name="P17"><text:a xlink:type="simple" xlink:href="#Figure!1%7Csequence" text:style-name="Internet_20_link" text:visited-style-name="Internet_20_link">Figure 2 : Architecture applicative d’Arche : couches Flask, services et stockage.<text:tab/>10</text:a></text:p>
          <text:p text:style-name="P17"><text:a xlink:type="simple" xlink:href="#Figure!2%7Csequence" text:style-name="Internet_20_link" text:visited-style-name="Internet_20_link">Figure 3 : Flux de synchronisation d’un document PDF : déduplication à deux niveaux et écriture contrôlée.<text:tab/>13</text:a></text:p>
          <text:p text:style-name="P17"><text:a xlink:type="simple" xlink:href="#Figure!3%7Csequence" text:style-name="Internet_20_link" text:visited-style-name="Internet_20_link">Figure 4 : Cycle de vie d’un document PDF : états de fraîcheur, transitions et chronologie de purge.<text:tab/>14</text:a></text:p>
          <text:p text:style-name="P17"><text:a xlink:type="simple" xlink:href="#Figure!4%7Csequence" text:style-name="Internet_20_link" text:visited-style-name="Internet_20_link">Figure 5 : Tableau de bord d’Arche : état du parc documentaire et des sources.<text:tab/>15</text:a></text:p>
          <text:p text:style-name="P17"><text:a xlink:type="simple" xlink:href="#Figure!5%7Csequence" text:style-name="Internet_20_link" text:visited-style-name="Internet_20_link">Figure 6 : Consultation des documents : filtres, recherche et statuts de fraîcheur.<text:tab/>16</text:a></text:p>
          <text:p text:style-name="P17"><text:a xlink:type="simple" xlink:href="#Figure!6%7Csequence" text:style-name="Internet_20_link" text:visited-style-name="Internet_20_link">Figure 7 : Viewer PDF intégré : lecture du document et métadonnées de collecte.<text:tab/>16</text:a></text:p>
          <text:p text:style-name="P17"><text:a xlink:type="simple" xlink:href="#Figure!7%7Csequence" text:style-name="Internet_20_link" text:visited-style-name="Internet_20_link">Figure 8 : Gestion des sources : protocoles, état et synchronisation.<text:tab/>17</text:a></text:p>
        </text:index-body>
      </text:illustration-index>
      <text:h text:style-name="Heading_20_1" text:outline-level="1"><text:bookmark-start text:name="glossaire"/><text:bookmark-start text:name="__RefHeading___Toc1085_2390793328"/>Glossaire<text:bookmark-end text:name="glossaire"/><text:bookmark-end text:name="__RefHeading___Toc1085_2390793328"/></text:h>
      <text:p text:style-name="P18"><text:span text:style-name="T5">API REST</text:span> : interface de programmation exposée via HTTP, permettant à d’autres logiciels d’interroger l’application.</text:p>
      <text:p text:style-name="P18"><text:span text:style-name="T5">CI</text:span> : Continuous Integration : exécution automatique des tests à chaque modification du code.</text:p>
      <text:p text:style-name="P18"><text:span text:style-name="T5">CRUD</text:span> : Create, Read, Update, Delete : les quatre opérations élémentaires sur une donnée.</text:p>
      <text:p text:style-name="P18"><text:span text:style-name="T5">CSP</text:span> : Content Security Policy : en-tête HTTP limitant les ressources chargées par le navigateur, ce qui réduit la surface d’attaque XSS.</text:p>
      <text:p text:style-name="P18"><text:span text:style-name="T5">CSRF</text:span> : Cross-Site Request Forgery : attaque forçant un navigateur authentifié à envoyer une requête non voulue ; contrée par un jeton sur chaque formulaire.</text:p>
      <text:p text:style-name="P18"><text:span text:style-name="T5">DBA</text:span> : Database Administrator : administrateur de base de données.</text:p>
      <text:p text:style-name="P18"><text:span text:style-name="T5">Docker</text:span> : technologie de conteneurs : l’application et ses dépendances sont empaquetées pour un déploiement reproductible.</text:p>
      <text:p text:style-name="P18"><text:span text:style-name="T5">Fernet</text:span> : schéma de chiffrement symétrique authentifié (AES-128-CBC + HMAC-SHA256), utilisé pour chiffrer les identifiants des sources en base.</text:p>
      <text:p text:style-name="P18"><text:span text:style-name="T5">Gunicorn</text:span> : serveur d’application Python utilisé en production pour exécuter l’application web.</text:p>
      <text:p text:style-name="P18"><text:span text:style-name="T5">HDS</text:span> : Hébergeur de Données de Santé : certification française encadrant l’hébergement de données médicales.</text:p>
      <text:p text:style-name="P18"><text:span text:style-name="T5">LDAP</text:span> : Lightweight Directory Access Protocol : annuaire d’entreprise ; utilisé ici pour déléguer l’authentification.</text:p>
      <text:p text:style-name="P18"><text:span text:style-name="T5">Mode dégradé</text:span> : procédure ou document utilisé lorsque le fonctionnement normal d’un outil métier n’est plus disponible.</text:p>
      <text:p text:style-name="P18"><text:span text:style-name="T5">Nonce</text:span> : valeur aléatoire à usage unique, exigée par la CSP pour autoriser un script.</text:p>
      <text:p text:style-name="P18"><text:soft-page-break/><text:span text:style-name="T5">ORM</text:span> : Object-Relational Mapping : fait correspondre les objets du code aux tables de la base (ici SQLAlchemy).</text:p>
      <text:p text:style-name="P18"><text:span text:style-name="T5">RBAC</text:span> : Role-Based Access Control : les droits sont attribués à des rôles, eux-mêmes assignés aux utilisateurs.</text:p>
      <text:p text:style-name="P18"><text:span text:style-name="T5">Recette</text:span> : tests menés par le destinataire (ici la DSI) pour valider la conformité avant mise en service.</text:p>
      <text:p text:style-name="P18"><text:span text:style-name="T5">SFTP</text:span> : SSH File Transfer Protocol : transfert de fichiers sécurisé via SSH, utilisé pour les sources Linux.</text:p>
      <text:p text:style-name="P18"><text:span text:style-name="T5">SMB/CIFS</text:span> : Server Message Block / Common Internet File System : protocole d’accès aux partages de fichiers Windows.</text:p>
      <text:p text:style-name="P18"><text:span text:style-name="T5">SMTP</text:span> : Simple Mail Transfer Protocol : protocole d’envoi des emails (notifications).</text:p>
      <text:p text:style-name="P18"><text:span text:style-name="T5">SQLite WAL</text:span> : Write-Ahead Logging : mode de journalisation de SQLite qui permet aux lectures de se poursuivre pendant une écriture.</text:p>
      <text:p text:style-name="P18"><text:span text:style-name="T5">Token Bearer</text:span> : jeton secret transmis dans l’en-tête Authorization ; authentifie les appels à l’API.</text:p>
      <text:p text:style-name="P18"><text:span text:style-name="T5">XSS</text:span> : Cross-Site Scripting : injection d’un script malveillant dans une page consultée par d’autres utilisateurs.</text:p>
      <text:h text:style-name="Heading_20_1" text:outline-level="1"><text:bookmark-start text:name="bibliographie-et-sitographie"/><text:bookmark-start text:name="__RefHeading___Toc1145_2390793328"/>Bibliographie et sitographie<text:bookmark-end text:name="bibliographie-et-sitographie"/><text:bookmark-end text:name="__RefHeading___Toc1145_2390793328"/></text:h>
      <text:h text:style-name="Heading_20_2" text:outline-level="2"><text:bookmark-start text:name="documentation-technique"/><text:bookmark-start text:name="__RefHeading___Toc1147_2390793328"/>Documentation technique<text:bookmark-end text:name="documentation-technique"/><text:bookmark-end text:name="__RefHeading___Toc1147_2390793328"/></text:h>
      <text:list text:style-name="L1">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sources-institutionnelles"/><text:bookmark-start text:name="__RefHeading___Toc1149_2390793328"/><text:soft-page-break/>Sources institutionnelles<text:bookmark-end text:name="sources-institutionnelles"/><text:bookmark-end text:name="__RefHeading___Toc1149_2390793328"/></text:h>
      <text:list text:style-name="L2">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6:57:02.248212900</dc:date>
    <meta:editing-duration>PT20M32S</meta:editing-duration>
    <meta:editing-cycles>11</meta:editing-cycles>
    <meta:document-statistic meta:table-count="0" meta:image-count="10" meta:object-count="0" meta:page-count="25" meta:paragraph-count="257" meta:word-count="6377" meta:character-count="42512" meta:non-whitespace-character-count="36337"/>
    <meta:user-defined meta:name="date">15 avril - 13 juin 2026</meta:user-defined>
    <meta:user-defined meta:name="subtitle">Rapport de stage - Bachelor Universitaire de Technologie Informatique - Année 2025-2026</meta:user-defined>
  </office:meta>
</office:document-meta>
</file>